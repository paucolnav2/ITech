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A000001271622CB6D.png" manifest:media-type="image/png"/>
  <manifest:file-entry manifest:full-path="Pictures/100000000000036F00000252048BED4D.png" manifest:media-type="image/png"/>
  <manifest:file-entry manifest:full-path="Pictures/10000000000003350000024EAEDDD60F.png" manifest:media-type="image/png"/>
  <manifest:file-entry manifest:full-path="Pictures/100000000000034300000254FECB40BA.png" manifest:media-type="image/png"/>
  <manifest:file-entry manifest:full-path="Pictures/10000000000000FC00000093A93198FA.png" manifest:media-type="image/png"/>
  <manifest:file-entry manifest:full-path="Pictures/10000000000000B9000000677638F17E.png" manifest:media-type="image/png"/>
  <manifest:file-entry manifest:full-path="Pictures/100000000000036C0000025100BFD626.png" manifest:media-type="image/png"/>
  <manifest:file-entry manifest:full-path="Pictures/100000000000037F0000024DE181F69F.png" manifest:media-type="image/png"/>
  <manifest:file-entry manifest:full-path="Pictures/100000000000033E000000BDB5EE5C15.png" manifest:media-type="image/png"/>
  <manifest:file-entry manifest:full-path="Pictures/100000000000037E00000221EA6CD148.png" manifest:media-type="image/png"/>
  <manifest:file-entry manifest:full-path="Pictures/1000000000000303000001D53A375720.png" manifest:media-type="image/png"/>
  <manifest:file-entry manifest:full-path="Pictures/10000000000003740000023881858E5F.png" manifest:media-type="image/png"/>
  <manifest:file-entry manifest:full-path="Pictures/100000000000033A000001F411867831.png" manifest:media-type="image/png"/>
  <manifest:file-entry manifest:full-path="Pictures/100000000000038500000217C953E637.png" manifest:media-type="image/png"/>
  <manifest:file-entry manifest:full-path="Pictures/100000000000038C00000248EC2D6220.png" manifest:media-type="image/png"/>
  <manifest:file-entry manifest:full-path="Pictures/1000000000000362000002500109935B.png" manifest:media-type="image/png"/>
  <manifest:file-entry manifest:full-path="Pictures/10000000000005340000020F3DCB0C29.png" manifest:media-type="image/png"/>
  <manifest:file-entry manifest:full-path="Pictures/1000000000000367000002278431D543.png" manifest:media-type="image/png"/>
  <manifest:file-entry manifest:full-path="Pictures/100000000000038A000002401947590A.png" manifest:media-type="image/png"/>
  <manifest:file-entry manifest:full-path="Pictures/10000000000006A40000044CCD1D4DD9.png" manifest:media-type="image/png"/>
  <manifest:file-entry manifest:full-path="Pictures/100000000000039000000237A44DA200.png" manifest:media-type="image/png"/>
  <manifest:file-entry manifest:full-path="Pictures/10000000000000B80000008EE0D7AC01.png" manifest:media-type="image/png"/>
  <manifest:file-entry manifest:full-path="Pictures/10000000000005550000027488EBC010.png" manifest:media-type="image/png"/>
  <manifest:file-entry manifest:full-path="Pictures/1000000000000391000002474B9A06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Table1.10" style:family="table-row">
      <style:table-row-properties style:min-row-height="0.3cm"/>
    </style:style>
    <style:style style:name="Table2" style:family="table">
      <style:table-properties style:width="17cm" style:rel-width="100%" table:align="center"/>
    </style:style>
    <style:style style:name="Table2.A" style:family="table-column">
      <style:table-column-properties style:column-width="3.401cm" style:rel-column-width="13107*"/>
    </style:style>
    <style:style style:name="Table2.A1" style:family="table-cell">
      <style:table-cell-properties fo:padding="0cm" fo:border="none"/>
    </style:style>
    <style:style style:name="P1" style:family="paragraph" style:parent-style-name="Standard">
      <style:paragraph-properties fo:text-align="start" style:justify-single-word="false"/>
      <style:text-properties fo:font-size="12pt" fo:font-style="normal" fo:font-weight="normal" officeooo:rsid="001c233d" officeooo:paragraph-rsid="001c233d" style:font-size-asian="10.5pt" style:font-style-asian="normal" style:font-weight-asian="normal" style:font-size-complex="12pt" style:font-style-complex="normal" style:font-weight-complex="normal"/>
    </style:style>
    <style:style style:name="P2" style:family="paragraph" style:parent-style-name="Title">
      <style:text-properties fo:font-size="54pt" officeooo:paragraph-rsid="001c3f46" style:font-size-asian="54pt" style:font-size-complex="54pt"/>
    </style:style>
    <style:style style:name="P3" style:family="paragraph" style:parent-style-name="Subtitle">
      <style:text-properties officeooo:paragraph-rsid="001c3f46"/>
    </style:style>
    <style:style style:name="P4" style:family="paragraph" style:parent-style-name="Text_20_body">
      <style:text-properties fo:font-size="15pt" style:font-size-asian="13.1000003814697pt" style:font-size-complex="15pt"/>
    </style:style>
    <style:style style:name="P5" style:family="paragraph" style:parent-style-name="Standard">
      <style:text-properties fo:font-size="14pt" officeooo:rsid="001c3f46" officeooo:paragraph-rsid="001c3f46" style:font-size-asian="14pt" style:font-size-complex="14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paragraph-properties fo:text-align="start" style:justify-single-word="false"/>
      <style:text-properties fo:font-size="14pt" fo:font-style="normal" fo:font-weight="normal" officeooo:rsid="0016fb61" officeooo:paragraph-rsid="0010d1e2" style:font-size-asian="14pt" style:font-style-asian="normal" style:font-weight-asian="normal" style:font-size-complex="14pt" style:font-style-complex="normal" style:font-weight-complex="normal"/>
    </style:style>
    <style:style style:name="P9" style:family="paragraph" style:parent-style-name="Heading_20_1">
      <style:paragraph-properties fo:break-before="page"/>
    </style:style>
    <style:style style:name="P10" style:family="paragraph" style:parent-style-name="Standard">
      <style:text-properties officeooo:rsid="001ed8a3" officeooo:paragraph-rsid="001ed8a3"/>
    </style:style>
    <style:style style:name="P11" style:family="paragraph" style:parent-style-name="Standard">
      <style:text-properties fo:font-size="14pt" officeooo:rsid="001ed8a3" officeooo:paragraph-rsid="001ed8a3" style:font-size-asian="14pt" style:font-size-complex="14pt"/>
    </style:style>
    <style:style style:name="P12" style:family="paragraph" style:parent-style-name="Standard">
      <style:text-properties fo:font-size="14pt" style:font-size-asian="12.25pt" style:font-size-complex="14pt"/>
    </style:style>
    <style:style style:name="P13" style:family="paragraph" style:parent-style-name="Standard">
      <style:text-properties fo:font-size="14pt" officeooo:rsid="001ed8a3" officeooo:paragraph-rsid="001ed8a3" style:font-size-asian="12.25pt" style:font-size-complex="14pt"/>
    </style:style>
    <style:style style:name="P14" style:family="paragraph" style:parent-style-name="Standard" style:list-style-name="L1">
      <style:text-properties fo:font-size="14pt" officeooo:rsid="001fe489" officeooo:paragraph-rsid="001fe489" style:font-size-asian="12.25pt" style:font-size-complex="14pt"/>
    </style:style>
    <style:style style:name="P15" style:family="paragraph" style:parent-style-name="Standard" style:list-style-name="L1">
      <style:text-properties fo:font-size="14pt" officeooo:rsid="0021e307" officeooo:paragraph-rsid="0021e307" style:font-size-asian="12.25pt" style:font-size-complex="14pt"/>
    </style:style>
    <style:style style:name="P16" style:family="paragraph" style:parent-style-name="Standard">
      <style:text-properties fo:font-size="14pt" officeooo:rsid="0021e307" officeooo:paragraph-rsid="0021e307" style:font-size-asian="12.25pt" style:font-size-complex="14pt"/>
    </style:style>
    <style:style style:name="P17" style:family="paragraph" style:parent-style-name="Heading_20_2">
      <style:paragraph-properties fo:break-before="page"/>
      <style:text-properties officeooo:rsid="0021e307" officeooo:paragraph-rsid="0021e307"/>
    </style:style>
    <style:style style:name="P18" style:family="paragraph" style:parent-style-name="First_20_paragraph">
      <style:text-properties fo:font-size="14pt" officeooo:paragraph-rsid="0021e307" style:font-size-asian="12.25pt" style:font-size-complex="14pt"/>
    </style:style>
    <style:style style:name="P19" style:family="paragraph" style:parent-style-name="Text_20_body" style:list-style-name="L2">
      <style:paragraph-properties fo:margin-top="0cm" fo:margin-bottom="0cm" style:contextual-spacing="false"/>
      <style:text-properties fo:font-size="14pt" officeooo:paragraph-rsid="0021e307" style:font-size-asian="14pt" style:font-size-complex="14pt"/>
    </style:style>
    <style:style style:name="P20" style:family="paragraph" style:parent-style-name="Text_20_body">
      <style:paragraph-properties fo:margin-top="0cm" fo:margin-bottom="0cm" style:contextual-spacing="false"/>
      <style:text-properties fo:font-size="14pt" officeooo:paragraph-rsid="0021e307" style:font-size-asian="14pt" style:font-size-complex="14pt"/>
    </style:style>
    <style:style style:name="P21" style:family="paragraph" style:parent-style-name="Heading_20_1">
      <style:paragraph-properties fo:break-before="page"/>
      <style:text-properties officeooo:rsid="0021ef50" officeooo:paragraph-rsid="0021ef50"/>
    </style:style>
    <style:style style:name="P22" style:family="paragraph" style:parent-style-name="Standard">
      <style:text-properties fo:font-size="14pt" style:font-size-asian="14pt" style:font-size-complex="14pt"/>
    </style:style>
    <style:style style:name="P23" style:family="paragraph" style:parent-style-name="Table_20_Heading">
      <style:paragraph-properties fo:text-align="center" style:justify-single-word="false"/>
      <style:text-properties fo:font-size="14pt" officeooo:paragraph-rsid="0029a2a8" style:font-size-asian="14pt" style:font-size-complex="14pt"/>
    </style:style>
    <style:style style:name="P24" style:family="paragraph" style:parent-style-name="Table_20_Contents">
      <style:paragraph-properties fo:text-align="center" style:justify-single-word="false"/>
      <style:text-properties fo:font-size="14pt" officeooo:paragraph-rsid="0029a2a8" style:font-size-asian="14pt" style:font-size-complex="14pt"/>
    </style:style>
    <style:style style:name="P25" style:family="paragraph" style:parent-style-name="Table_20_Contents">
      <style:paragraph-properties fo:text-align="center" style:justify-single-word="false"/>
      <style:text-properties fo:font-size="14pt" fo:font-weight="bold" officeooo:paragraph-rsid="0029a2a8" style:font-size-asian="14pt" style:font-weight-asian="bold" style:font-size-complex="14pt" style:font-weight-complex="bold"/>
    </style:style>
    <style:style style:name="P26" style:family="paragraph" style:parent-style-name="Standard">
      <style:text-properties fo:font-size="14pt" officeooo:paragraph-rsid="0029a2a8" style:font-size-asian="12.25pt" style:font-size-complex="14pt"/>
    </style:style>
    <style:style style:name="P27" style:family="paragraph" style:parent-style-name="Heading_20_3">
      <style:text-properties officeooo:paragraph-rsid="002aa049"/>
    </style:style>
    <style:style style:name="P28" style:family="paragraph" style:parent-style-name="Text_20_body">
      <style:text-properties officeooo:paragraph-rsid="002aa049"/>
    </style:style>
    <style:style style:name="P29" style:family="paragraph" style:parent-style-name="Standard" style:list-style-name="L3">
      <style:text-properties fo:font-size="14pt" officeooo:rsid="0029a2a8" officeooo:paragraph-rsid="0029a2a8" style:font-size-asian="12.25pt" style:font-size-complex="14pt"/>
    </style:style>
    <style:style style:name="P30" style:family="paragraph" style:parent-style-name="Standard" style:list-style-name="L3">
      <style:text-properties fo:font-size="14pt" officeooo:rsid="002aa049" officeooo:paragraph-rsid="002aa049" style:font-size-asian="12.25pt" style:font-size-complex="14pt"/>
    </style:style>
    <style:style style:name="P31" style:family="paragraph" style:parent-style-name="Standard">
      <style:text-properties fo:font-size="14pt" officeooo:rsid="002aa049" officeooo:paragraph-rsid="002aa049" style:font-size-asian="12.25pt" style:font-size-complex="14pt"/>
    </style:style>
    <style:style style:name="P32" style:family="paragraph" style:parent-style-name="Standard">
      <style:paragraph-properties fo:margin-left="0cm" fo:margin-right="0cm" fo:text-indent="0cm" style:auto-text-indent="false"/>
      <style:text-properties officeooo:paragraph-rsid="002aa049"/>
    </style:style>
    <style:style style:name="P33" style:family="paragraph" style:parent-style-name="Table_20_Heading">
      <style:paragraph-properties fo:line-height="115%" fo:text-align="center" style:justify-single-word="false"/>
      <style:text-properties officeooo:paragraph-rsid="002aa049"/>
    </style:style>
    <style:style style:name="P34" style:family="paragraph" style:parent-style-name="Table_20_Contents">
      <style:paragraph-properties fo:line-height="115%" fo:text-align="center" style:justify-single-word="false"/>
      <style:text-properties officeooo:paragraph-rsid="002aa049"/>
    </style:style>
    <style:style style:name="P35" style:family="paragraph" style:parent-style-name="Table_20_Contents">
      <style:paragraph-properties fo:line-height="115%" fo:text-align="center" style:justify-single-word="false"/>
      <style:text-properties fo:font-weight="bold" officeooo:paragraph-rsid="002aa049" style:font-weight-asian="bold" style:font-weight-complex="bold"/>
    </style:style>
    <style:style style:name="P36" style:family="paragraph" style:parent-style-name="Standard">
      <style:paragraph-properties fo:line-height="115%" fo:text-align="center" style:justify-single-word="false"/>
      <style:text-properties officeooo:paragraph-rsid="002aa049"/>
    </style:style>
    <style:style style:name="P37" style:family="paragraph" style:parent-style-name="Quotations">
      <style:paragraph-properties fo:margin-left="0cm" fo:margin-right="0cm" fo:text-indent="0cm" style:auto-text-indent="false"/>
      <style:text-properties officeooo:paragraph-rsid="002aa049"/>
    </style:style>
    <style:style style:name="P38" style:family="paragraph" style:parent-style-name="Heading_20_2">
      <style:paragraph-properties fo:break-before="page"/>
      <style:text-properties officeooo:paragraph-rsid="0023d626"/>
    </style:style>
    <style:style style:name="P39" style:family="paragraph" style:parent-style-name="Standard">
      <style:text-properties fo:font-size="14pt" fo:font-weight="bold" officeooo:paragraph-rsid="0023d626" style:font-size-asian="14pt" style:font-weight-asian="bold" style:font-size-complex="14pt" style:font-weight-complex="bold"/>
    </style:style>
    <style:style style:name="P40" style:family="paragraph" style:parent-style-name="Standard">
      <style:text-properties officeooo:paragraph-rsid="0023d626"/>
    </style:style>
    <style:style style:name="P41" style:family="paragraph" style:parent-style-name="Standard">
      <style:text-properties fo:font-size="14pt" officeooo:paragraph-rsid="0023d626" style:font-size-asian="14pt" style:font-size-complex="14pt"/>
    </style:style>
    <style:style style:name="P42" style:family="paragraph" style:parent-style-name="Standard">
      <style:text-properties fo:font-size="14pt" fo:font-weight="normal" officeooo:paragraph-rsid="0023d626" style:font-size-asian="14pt" style:font-weight-asian="normal" style:font-size-complex="14pt" style:font-weight-complex="normal"/>
    </style:style>
    <style:style style:name="P43" style:family="paragraph" style:parent-style-name="Standard">
      <style:text-properties fo:color="#ff0000" loext:opacity="100%" fo:font-size="14pt" fo:font-weight="normal" officeooo:paragraph-rsid="0023d626" style:font-size-asian="14pt" style:font-weight-asian="normal" style:font-size-complex="14pt" style:font-weight-complex="normal"/>
    </style:style>
    <style:style style:name="P44" style:family="paragraph" style:parent-style-name="Standard">
      <style:text-properties fo:font-size="14pt" fo:font-weight="normal" officeooo:rsid="00249618" officeooo:paragraph-rsid="00249618" style:font-size-asian="14pt" style:font-weight-asian="normal" style:font-size-complex="14pt" style:font-weight-complex="normal"/>
    </style:style>
    <style:style style:name="P45" style:family="paragraph" style:parent-style-name="Heading_20_2">
      <style:text-properties officeooo:rsid="00249618" officeooo:paragraph-rsid="00249618"/>
    </style:style>
    <style:style style:name="P46" style:family="paragraph" style:parent-style-name="Standard">
      <style:text-properties fo:font-size="14pt" officeooo:rsid="00249618" officeooo:paragraph-rsid="00249618" style:font-size-asian="12.25pt" style:font-size-complex="14pt"/>
    </style:style>
    <style:style style:name="P47" style:family="paragraph" style:parent-style-name="Standard">
      <style:text-properties fo:font-size="14pt" fo:font-weight="bold" officeooo:rsid="00249618" officeooo:paragraph-rsid="00249618" style:font-size-asian="12.25pt" style:font-weight-asian="bold" style:font-size-complex="14pt" style:font-weight-complex="bold"/>
    </style:style>
    <style:style style:name="P48" style:family="paragraph" style:parent-style-name="Standard">
      <style:text-properties fo:font-size="14pt" fo:font-weight="normal" officeooo:rsid="00249618" officeooo:paragraph-rsid="00249618" style:font-size-asian="12.25pt" style:font-weight-asian="normal" style:font-size-complex="14pt" style:font-weight-complex="normal"/>
    </style:style>
    <style:style style:name="P49" style:family="paragraph" style:parent-style-name="Standard">
      <style:text-properties fo:font-size="14pt" fo:font-weight="normal" officeooo:rsid="00276a31" officeooo:paragraph-rsid="00276a31" style:font-size-asian="12.25pt" style:font-weight-asian="normal" style:font-size-complex="14pt" style:font-weight-complex="normal"/>
    </style:style>
    <style:style style:name="P50" style:family="paragraph" style:parent-style-name="Standard">
      <style:text-properties fo:font-size="14pt" officeooo:paragraph-rsid="00276a31" style:font-size-asian="12.25pt" style:font-size-complex="14pt"/>
    </style:style>
    <style:style style:name="P51" style:family="paragraph" style:parent-style-name="Standard" style:list-style-name="L4">
      <style:text-properties fo:font-size="14pt" officeooo:paragraph-rsid="00276a31" style:font-size-asian="12.25pt" style:font-size-complex="14pt"/>
    </style:style>
    <style:style style:name="P52" style:family="paragraph" style:parent-style-name="Standard">
      <style:text-properties fo:font-size="14pt" fo:font-weight="bold" officeooo:rsid="00276a31" officeooo:paragraph-rsid="00276a31" style:font-size-asian="12.25pt" style:font-weight-asian="bold" style:font-size-complex="14pt" style:font-weight-complex="bold"/>
    </style:style>
    <style:style style:name="P53" style:family="paragraph" style:parent-style-name="Heading_20_2">
      <style:text-properties officeooo:paragraph-rsid="00277682"/>
    </style:style>
    <style:style style:name="P54" style:family="paragraph" style:parent-style-name="Standard" style:list-style-name="L5">
      <style:text-properties fo:font-size="14pt" style:font-size-asian="12.25pt" style:font-size-complex="14pt"/>
    </style:style>
    <style:style style:name="P55" style:family="paragraph" style:parent-style-name="Standard">
      <style:text-properties fo:font-size="14pt" officeooo:paragraph-rsid="00277682" style:font-size-asian="12.25pt" style:font-size-complex="14pt"/>
    </style:style>
    <style:style style:name="P56" style:family="paragraph" style:parent-style-name="Standard">
      <style:text-properties fo:font-size="14pt" fo:font-weight="bold" officeooo:paragraph-rsid="00277682" style:font-size-asian="12.25pt" style:font-weight-asian="bold" style:font-size-complex="14pt" style:font-weight-complex="bold"/>
    </style:style>
    <style:style style:name="P57" style:family="paragraph" style:parent-style-name="Standard">
      <style:text-properties fo:font-size="14pt" fo:font-weight="normal" officeooo:paragraph-rsid="00277682" style:font-size-asian="12.25pt" style:font-weight-asian="normal" style:font-size-complex="14pt" style:font-weight-complex="normal"/>
    </style:style>
    <style:style style:name="P58" style:family="paragraph" style:parent-style-name="Standard">
      <style:text-properties fo:font-size="14pt" fo:font-weight="normal" officeooo:rsid="0027b406" officeooo:paragraph-rsid="0027b406" style:font-size-asian="12.25pt" style:font-weight-asian="normal" style:font-size-complex="14pt" style:font-weight-complex="normal"/>
    </style:style>
    <style:style style:name="P59" style:family="paragraph" style:parent-style-name="Standard" style:list-style-name="L6">
      <style:text-properties fo:font-size="14pt" style:font-size-asian="12.25pt" style:font-size-complex="14pt"/>
    </style:style>
    <style:style style:name="P60" style:family="paragraph" style:parent-style-name="Standard" style:list-style-name="L6">
      <style:text-properties fo:font-size="14pt" officeooo:paragraph-rsid="0027b406" style:font-size-asian="12.25pt" style:font-size-complex="14pt"/>
    </style:style>
    <style:style style:name="P61" style:family="paragraph" style:parent-style-name="Standard">
      <style:text-properties fo:font-size="14pt" officeooo:paragraph-rsid="0027b406" style:font-size-asian="12.25pt" style:font-size-complex="14pt"/>
    </style:style>
    <style:style style:name="P62" style:family="paragraph" style:parent-style-name="Standard">
      <style:text-properties fo:font-size="14pt" fo:font-weight="bold" officeooo:rsid="0027b406" officeooo:paragraph-rsid="0027b406" style:font-size-asian="12.25pt" style:font-weight-asian="bold" style:font-size-complex="14pt" style:font-weight-complex="bold"/>
    </style:style>
    <style:style style:name="P63" style:family="paragraph" style:parent-style-name="Standard">
      <style:text-properties fo:color="#ff0000" loext:opacity="100%" fo:font-size="14pt" fo:font-weight="normal" officeooo:rsid="0027b406" officeooo:paragraph-rsid="0027b406" style:font-size-asian="12.25pt" style:font-weight-asian="normal" style:font-size-complex="14pt" style:font-weight-complex="normal"/>
    </style:style>
    <style:style style:name="P64" style:family="paragraph" style:parent-style-name="Standard">
      <style:text-properties fo:font-size="14pt" fo:font-weight="bold" style:font-size-asian="12.25pt" style:font-weight-asian="bold" style:font-size-complex="14pt" style:font-weight-complex="bold"/>
    </style:style>
    <style:style style:name="P65" style:family="paragraph" style:parent-style-name="Standard">
      <style:text-properties fo:font-size="14pt" fo:font-weight="normal" style:font-size-asian="12.25pt" style:font-weight-asian="normal" style:font-size-complex="14pt" style:font-weight-complex="normal"/>
    </style:style>
    <style:style style:name="P66" style:family="paragraph" style:parent-style-name="Standard">
      <style:text-properties officeooo:rsid="0027c733" officeooo:paragraph-rsid="0027c733"/>
    </style:style>
    <style:style style:name="P67" style:family="paragraph" style:parent-style-name="Standard">
      <style:text-properties fo:font-size="14pt" officeooo:paragraph-rsid="0027c733" style:font-size-asian="14pt" style:font-size-complex="14pt"/>
    </style:style>
    <style:style style:name="P68" style:family="paragraph" style:parent-style-name="Standard">
      <style:text-properties fo:font-size="14pt" officeooo:rsid="0027c733" officeooo:paragraph-rsid="0027c733" style:font-size-asian="12.25pt" style:font-size-complex="14pt"/>
    </style:style>
    <style:style style:name="P69" style:family="paragraph" style:parent-style-name="Standard">
      <style:text-properties fo:font-size="14pt" fo:font-style="italic" style:text-underline-style="none" fo:font-weight="bold" officeooo:rsid="0027c733" officeooo:paragraph-rsid="0027c733" style:font-size-asian="12.25pt" style:font-style-asian="italic" style:font-weight-asian="bold" style:font-size-complex="14pt" style:font-style-complex="italic" style:font-weight-complex="bold"/>
    </style:style>
    <style:style style:name="T1" style:family="text">
      <style:text-properties officeooo:rsid="001c3f46"/>
    </style:style>
    <style:style style:name="T2" style:family="text">
      <style:text-properties fo:font-size="14pt" officeooo:rsid="001c3f46" style:font-size-asian="14pt" style:font-size-complex="14pt"/>
    </style:style>
    <style:style style:name="T3" style:family="text">
      <style:text-properties fo:font-size="14pt" fo:font-weight="bold" officeooo:rsid="001c3f46"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color="#c9211e" loext:opacity="100%"/>
    </style:style>
    <style:style style:name="T6" style:family="text">
      <style:text-properties fo:color="#000000" loext:opacity="100%"/>
    </style:style>
    <style:style style:name="T7" style:family="text">
      <style:text-properties fo:color="#000000" loext:opacity="100%" officeooo:rsid="0021e307"/>
    </style:style>
    <style:style style:name="T8" style:family="text">
      <style:text-properties fo:color="#ff0000" loext:opacity="100%"/>
    </style:style>
    <style:style style:name="T9" style:family="text">
      <style:text-properties officeooo:rsid="0021e307"/>
    </style:style>
    <style:style style:name="T10" style:family="text">
      <style:text-properties officeooo:rsid="002aa049"/>
    </style:style>
    <style:style style:name="T11" style:family="text">
      <style:text-properties fo:color="#2a6099" loext:opacity="100%"/>
    </style:style>
    <style:style style:name="T12" style:family="text">
      <style:text-properties fo:color="#158466" loext:opacity="100%"/>
    </style:style>
    <style:style style:name="T13" style:family="text">
      <style:text-properties officeooo:rsid="0023d626"/>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color="#ff4000" loext:opacity="100%"/>
    </style:style>
    <style:style style:name="T17" style:family="text">
      <style:text-properties fo:color="#ff4000" loext:opacity="100%" officeooo:rsid="0027b406"/>
    </style:style>
    <style:style style:name="T18" style:family="text">
      <style:text-properties fo:color="#00a933" loext:opacity="100%"/>
    </style:style>
    <style:style style:name="T19" style:family="text">
      <style:text-properties fo:color="#00a933" loext:opacity="100%" officeooo:rsid="0027b406"/>
    </style:style>
    <style:style style:name="T20" style:family="text">
      <style:text-properties fo:color="#ff0000" loext:opacity="100%" officeooo:rsid="0027b406"/>
    </style:style>
    <style:style style:name="T21" style:family="text">
      <style:text-properties officeooo:rsid="0027b406"/>
    </style:style>
    <style:style style:name="T22" style:family="text">
      <style:text-properties officeooo:rsid="0027c7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275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8.48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33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8.25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3.01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5.47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7.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3.854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9.326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2.76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2cm" svg:y="-2.701cm" svg:width="20.999cm" svg:height="4.778cm" draw:z-index="0"><draw:image xlink:href="Pictures/100000000000033E000000BDB5EE5C1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text:span text:style-name="T1">Tech</text:span></text:p>
      <text:p text:style-name="P3">Memoria de Proyecto PIM</text:p>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P5"><text:span text:style-name="T2">Desarrollo de Aplicaciones Multiplataforma <text:s/>- </text:span><text:span text:style-name="T3"><text:s/>2º DAM</text:span></text:p>
      <text:p text:style-name="P5"><text:span text:style-name="T4">Alumno</text:span>: Pau Collado Navarro <text:s text:c="41"/><text:span text:style-name="T4">Centro</text:span>: IES Salvador gadea</text:p>
      <text:p text:style-name="P5"><text:span text:style-name="T4">Curso</text:span>: 2025-2026 <text:s text:c="25"/><text:span text:style-name="T4">Repositorio:</text:span> <text:a xlink:type="simple" xlink:href="https://github.com/paucolnav2/ITech" text:style-name="Internet_20_link" text:visited-style-name="Visited_20_Internet_20_Link">https://github.com/paucolnav2/ITech</text:a></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Índice</text:p>
          </text:index-title>
          <text:p text:style-name="P6"><text:a xlink:type="simple" xlink:href="#__RefHeading___Toc918_2288906620" office:name="1. Presentación del Proyecto" text:style-name="Index_20_Link" text:visited-style-name="Index_20_Link">1. Presentación del Proyecto<text:tab/>3</text:a></text:p>
          <text:p text:style-name="P7"><text:a xlink:type="simple" xlink:href="#__RefHeading___Toc920_2288906620" office:name="1.1 ¿Qué es ITech y qué problema resuelve?" text:style-name="Index_20_Link" text:visited-style-name="Index_20_Link">1.1 ¿Qué es ITech y qué problema resuelve?<text:tab/>3</text:a></text:p>
          <text:p text:style-name="P7"><text:a xlink:type="simple" xlink:href="#__RefHeading___Toc990_2288906620" office:name="1.2 Arquitectura general" text:style-name="Index_20_Link" text:visited-style-name="Index_20_Link">1.2 Arquitectura general<text:tab/>3</text:a></text:p>
          <text:p text:style-name="P7"><text:a xlink:type="simple" xlink:href="#__RefHeading___Toc992_2288906620" office:name="1.3 Flujo principal de datos" text:style-name="Index_20_Link" text:visited-style-name="Index_20_Link">1.3 Flujo principal de datos<text:tab/>4</text:a></text:p>
          <text:p text:style-name="P6"><text:a xlink:type="simple" xlink:href="#__RefHeading___Toc994_2288906620" office:name="2. Evidencias" text:style-name="Index_20_Link" text:visited-style-name="Index_20_Link">2. Evidencias<text:tab/>5</text:a></text:p>
          <text:p text:style-name="P7"><text:a xlink:type="simple" xlink:href="#__RefHeading___Toc996_2288906620" office:name="2.1 (Introducción a la nube pública) RA 3 - Arquitectura AWS" text:style-name="Index_20_Link" text:visited-style-name="Index_20_Link">2.1 (Introducción a la nube pública) RA 3 - Arquitectura AWS<text:tab/>5</text:a></text:p>
          <text:p text:style-name="P7"><text:a xlink:type="simple" xlink:href="#__RefHeading___Toc1514_2288906620" office:name=" 2.2 (Sistemas de gestión) RA 3 – Integración con Odoo ERP" text:style-name="Index_20_Link" text:visited-style-name="Index_20_Link"><text:s/>2.2 (Sistemas de gestión) RA 3 – Integración con Odoo ERP<text:tab/>6</text:a></text:p>
          <text:p text:style-name="P7"><text:a xlink:type="simple" xlink:href="#__RefHeading___Toc1516_2288906620" office:name="2.3 (Programación de servicios y procesos) RA 3 – Pool de hilos concurrente" text:style-name="Index_20_Link" text:visited-style-name="Index_20_Link">2.3 (Programación de servicios y procesos) RA 3 – Pool de hilos concurrente<text:tab/>8</text:a></text:p>
          <text:p text:style-name="P7"><text:a xlink:type="simple" xlink:href="#__RefHeading___Toc1518_2288906620" office:name="2.4 (Acceso a datos) RA 2 - DAOs con JDBC" text:style-name="Index_20_Link" text:visited-style-name="Index_20_Link">2.4 (Acceso a datos) RA 2 - DAOs con JDBC<text:tab/>11</text:a></text:p>
          <text:p text:style-name="P7"><text:a xlink:type="simple" xlink:href="#__RefHeading___Toc1520_2288906620" office:name="2.5 (Programación multimedia y dispositivos móviles) RA 2 — Aplicación React Native" text:style-name="Index_20_Link" text:visited-style-name="Index_20_Link">2.5 (Programación multimedia y dispositivos móviles) RA 2 — Aplicación React Native<text:tab/>13</text:a></text:p>
          <text:p text:style-name="P7"><text:a xlink:type="simple" xlink:href="#__RefHeading___Toc1522_2288906620" office:name="2.6 Ejecución estandarizada — Docker Compose" text:style-name="Index_20_Link" text:visited-style-name="Index_20_Link">2.6 Ejecución estandarizada — Docker Compose<text:tab/>17</text:a></text:p>
          <text:p text:style-name="P7"><text:a xlink:type="simple" xlink:href="#__RefHeading___Toc1524_2288906620" office:name="2.7 (Entornos de desarrollo) RA 4 — Repositorio y control de versiones" text:style-name="Index_20_Link" text:visited-style-name="Index_20_Link">2.7 (Entornos de desarrollo) RA 4 — Repositorio y control de versiones<text:tab/>19</text:a></text:p>
          <text:p text:style-name="P6"><text:a xlink:type="simple" xlink:href="#__RefHeading___Toc1526_2288906620" office:name="3. Reflexión Final" text:style-name="Index_20_Link" text:visited-style-name="Index_20_Link">3. Reflexión Final<text:tab/>20</text:a></text:p>
          <text:p text:style-name="P7"><text:a xlink:type="simple" xlink:href="#__RefHeading___Toc1528_2288906620" office:name="Organización del trabajo" text:style-name="Index_20_Link" text:visited-style-name="Index_20_Link">Organización del trabajo<text:tab/>20</text:a></text:p>
          <text:p text:style-name="P7"><text:a xlink:type="simple" xlink:href="#__RefHeading___Toc1530_2288906620" office:name="Dificultades encontradas" text:style-name="Index_20_Link" text:visited-style-name="Index_20_Link">Dificultades encontradas<text:tab/>20</text:a></text:p>
          <text:p text:style-name="P7"><text:a xlink:type="simple" xlink:href="#__RefHeading___Toc1532_2288906620" office:name="Conclusión" text:style-name="Index_20_Link" text:visited-style-name="Index_20_Link">Conclusión<text:tab/>20</text:a></text:p>
        </text:index-body>
      </text:table-of-content>
      <text:p text:style-name="P8"/>
      <text:h text:style-name="P9" text:outline-level="1"><text:bookmark-start text:name="__RefHeading___Toc918_2288906620"/>1. Presentación del Proyecto<text:bookmark-end text:name="__RefHeading___Toc918_2288906620"/></text:h>
      <text:h text:style-name="Heading_20_2" text:outline-level="2"><text:bookmark-start text:name="__RefHeading___Toc920_2288906620"/>1.1 ¿Qué es ITech y qué problema resuelve?<text:bookmark-end text:name="__RefHeading___Toc920_2288906620"/></text:h>
      <text:p text:style-name="P10"/>
      <text:p text:style-name="P11">ITech es una plataforma de monitorización industrial en tiempo real. Su objetivo es ingestar continuamente los datos de sensores industriales que recogen distintos tipos de datos (temperatura, humedad, vibración, presión, cantidad de luz o sonido), detectar situaciones de riesgo y generar automáticamente órdenes de mantenimiento correctivo, eliminando la dependencia de inspecciones manuales y reduciendo el tiempo de respuesta ante fallos.</text:p>
      <text:p text:style-name="P11"/>
      <text:p text:style-name="P11">El problema que resuelve es simple: en una instalación industrial sin monitorización centralizada, un operario no puede saber si una máquina está en estado crítico hasta que falla físicamente. Con ITech, los avisos tardan milisegundos. Cuando un sensor supera un umbral peligroso de forma sostenida, el sistema crea un ticket de intervención en el ERP sin intervención humana y marca la máquina como fuera de servicio en los paneles de control.</text:p>
      <text:p text:style-name="P11"/>
      <text:h text:style-name="Heading_20_2" text:outline-level="2"><text:bookmark-start text:name="__RefHeading___Toc990_2288906620"/>1.2 Arquitectura general<text:bookmark-end text:name="__RefHeading___Toc990_2288906620"/></text:h>
      <text:p text:style-name="P12"/>
      <text:p text:style-name="P13">El sistema se compone de cinco capas independientes que se comunican entre sí:</text:p>
      <text:p text:style-name="P13"/>
      <text:list text:style-name="L1">
        <text:list-item>
          <text:p text:style-name="P14"><text:span text:style-name="T4">Sensores industriales </text:span>→ dispositivos que envían lecturas periódicas por TCP al servidor Java.</text:p>
        </text:list-item>
        <text:list-item>
          <text:p text:style-name="P14"><text:span text:style-name="T4">Servidor Java</text:span> → núcleo del sistema. Recibe conexiones concurrentes, formatea y comprueba la validez del formato de los mensajes, persiste los datos en MySQL y evalúa si el dato es una anomalía.</text:p>
        </text:list-item>
        <text:list-item>
          <text:p text:style-name="P14"><text:span text:style-name="T4">Base de datos MySQL</text:span> → almacena el catálogo de fábricas, máquinas y sensores, el histórico de lecturas y el registro de anomalías.</text:p>
        </text:list-item>
        <text:list-item>
          <text:p text:style-name="P15"><text:span text:style-name="T4">Odoo ERP </text:span>→ recibe llamadas del servidor Java vía JSON-RPC para crear tickets de mantenimiento correctivo cuando se detecta una anomalía crítica.</text:p>
        </text:list-item>
        <text:list-item>
          <text:p text:style-name="P15"><text:span text:style-name="T4">Aplicaciones frontend</text:span> → ITechApp (React Native / Expo) para técnicos en planta e ITechWeb (Expo web) para supervisión general, ambas consumiendo la API HTTP del servidor Java.</text:p>
        </text:list-item>
      </text:list>
      <text:p text:style-name="P16"/>
      <text:p text:style-name="P16"/>
      <text:p text:style-name="P16"/>
      <text:p text:style-name="P16"/>
      <text:h text:style-name="P17" text:outline-level="2"><text:bookmark-start text:name="__RefHeading___Toc992_2288906620"/>1.3 Flujo principal de datos<text:bookmark-end text:name="__RefHeading___Toc992_2288906620"/></text:h>
      <text:p text:style-name="P12"/>
      <text:p text:style-name="P18">Cuando un sensor envía una lectura, el recorrido completo es el siguiente:</text:p>
      <text:list text:style-name="L2">
        <text:list-item>
          <text:p text:style-name="P19">El <text:span text:style-name="T5">ServerSocket</text:span> en <text:span text:style-name="T5">Main.java</text:span> acepta la conexión y la encola en <text:span text:style-name="T5">ConnectionQueue</text:span><text:span text:style-name="T6"> </text:span><text:span text:style-name="T7">haciendo uso de sockets</text:span>.</text:p>
        </text:list-item>
        <text:list-item>
          <text:p text:style-name="P19">Un hilo <text:span text:style-name="T5">ClientHandler</text:span> libre toma la conexión. Lee la primera línea y determina si es una petición HTTP (frontend) o un mensaje TCP (sensor).</text:p>
        </text:list-item>
        <text:list-item>
          <text:p text:style-name="P19"><text:span text:style-name="T8">TCPHandler</text:span> parsea el mensaje con <text:span text:style-name="T8">GeneralParser</text:span>, extrae el ID de sensor, tipo y valor.</text:p>
        </text:list-item>
        <text:list-item>
          <text:p text:style-name="P19"><text:span text:style-name="T8">SensorDataDAO.saveSensorData()</text:span> inserta el registro en MySQL usando un <text:span text:style-name="T8">PreparedStatement</text:span>. Durante la inserción evalúa si el valor supera el umbral definido para ese tipo de sensor.</text:p>
        </text:list-item>
        <text:list-item>
          <text:p text:style-name="P19">Si es anomalía, <text:span text:style-name="T8">AnomalyHandler.handleAnomaly()</text:span> comprueba si se han acumulado suficientes anomalías consecutivas en el intervalo configurado. Si se supera el umbral, <text:span text:style-name="T8">MachineDAO.updateMachineState()</text:span> marca la máquina en rojo y <text:span text:style-name="T8">OdooClient.createTicket()</text:span> abre un ticket de intervención en Odoo.</text:p>
        </text:list-item>
        <text:list-item>
          <text:p text:style-name="P19">Las apps frontend consultan periódicamente <text:span text:style-name="T9">(cada N segundos)</text:span> el endpoint HTTP del servidor y muestran el estado actualizado.</text:p>
        </text:list-item>
      </text:list>
      <text:p text:style-name="P20"/>
      <text:p text:style-name="P20"/>
      <text:h text:style-name="P21" text:outline-level="1"><text:bookmark-start text:name="__RefHeading___Toc994_2288906620"/>2. Evidencias<text:bookmark-end text:name="__RefHeading___Toc994_2288906620"/></text:h>
      <text:p text:style-name="Standard"/>
      <text:h text:style-name="Heading_20_2" text:outline-level="2"><text:bookmark-start text:name="__RefHeading___Toc996_2288906620"/>2.1 (Introducción a la nube pública) RA 3 - Arquitectura AWS<text:bookmark-end text:name="__RefHeading___Toc996_2288906620"/></text:h>
      <text:p text:style-name="Standard"/>
      <text:p text:style-name="P22"><text:span text:style-name="T4">Compromiso adquirido</text:span>: Diseño técnico y diagrama de arquitectura para una infraestructura de ingesta de datos en AWS utilizando servicios como AWS IoT Core, Kinesis y EC2, incluyendo tabla de costes mensuales estimados.</text:p>
      <text:p text:style-name="P22"/>
      <text:h text:style-name="Heading_20_3" text:outline-level="3">2.1.1 Supuestos de escala</text:h>
      <text:p text:style-name="P12"/>
      <table:table table:name="Table1" table:style-name="Table1">
        <table:table-column table:style-name="Table1.A"/>
        <table:table-column table:style-name="Table1.B"/>
        <table:table-header-rows>
          <table:table-row>
            <table:table-cell table:style-name="Table1.A1" office:value-type="string">
              <text:p text:style-name="P23">Parámetro</text:p>
            </table:table-cell>
            <table:table-cell table:style-name="Table1.A1" office:value-type="string">
              <text:p text:style-name="P23">Valor asumido</text:p>
            </table:table-cell>
          </table:table-row>
        </table:table-header-rows>
        <table:table-row>
          <table:table-cell table:style-name="Table1.A1" office:value-type="string">
            <text:p text:style-name="P24">Número de fábricas</text:p>
          </table:table-cell>
          <table:table-cell table:style-name="Table1.A1" office:value-type="string">
            <text:p text:style-name="P24">5</text:p>
          </table:table-cell>
        </table:table-row>
        <table:table-row>
          <table:table-cell table:style-name="Table1.A1" office:value-type="string">
            <text:p text:style-name="P24">Máquinas por fábrica</text:p>
          </table:table-cell>
          <table:table-cell table:style-name="Table1.A1" office:value-type="string">
            <text:p text:style-name="P24">20 (100 total)</text:p>
          </table:table-cell>
        </table:table-row>
        <table:table-row>
          <table:table-cell table:style-name="Table1.A1" office:value-type="string">
            <text:p text:style-name="P24">Sensores por máquina</text:p>
          </table:table-cell>
          <table:table-cell table:style-name="Table1.A1" office:value-type="string">
            <text:p text:style-name="P24">3 (300 total)</text:p>
          </table:table-cell>
        </table:table-row>
        <table:table-row>
          <table:table-cell table:style-name="Table1.A1" office:value-type="string">
            <text:p text:style-name="P24">Frecuencia de envío</text:p>
          </table:table-cell>
          <table:table-cell table:style-name="Table1.A1" office:value-type="string">
            <text:p text:style-name="P24">1 mensaje cada 10 s por sensor</text:p>
          </table:table-cell>
        </table:table-row>
        <table:table-row>
          <table:table-cell table:style-name="Table1.A1" office:value-type="string">
            <text:p text:style-name="P24">Mensajes/minuto</text:p>
          </table:table-cell>
          <table:table-cell table:style-name="Table1.A1" office:value-type="string">
            <text:p text:style-name="P24">1.800</text:p>
          </table:table-cell>
        </table:table-row>
        <table:table-row>
          <table:table-cell table:style-name="Table1.A1" office:value-type="string">
            <text:p text:style-name="P24">Mensajes/día</text:p>
          </table:table-cell>
          <table:table-cell table:style-name="Table1.A1" office:value-type="string">
            <text:p text:style-name="P24">~2.592.000</text:p>
          </table:table-cell>
        </table:table-row>
        <table:table-row>
          <table:table-cell table:style-name="Table1.A1" office:value-type="string">
            <text:p text:style-name="P25">Mensajes/mes</text:p>
          </table:table-cell>
          <table:table-cell table:style-name="Table1.A1" office:value-type="string">
            <text:p text:style-name="P25">~77.760.000</text:p>
          </table:table-cell>
        </table:table-row>
        <table:table-row>
          <table:table-cell table:style-name="Table1.A1" office:value-type="string">
            <text:p text:style-name="P24">Tamaño medio de mensaje</text:p>
          </table:table-cell>
          <table:table-cell table:style-name="Table1.A1" office:value-type="string">
            <text:p text:style-name="P24">256 bytes</text:p>
          </table:table-cell>
        </table:table-row>
        <table:table-row table:style-name="Table1.10">
          <table:table-cell table:style-name="Table1.A1" office:value-type="string">
            <text:p text:style-name="P24">Tráfico de ingesta/mes</text:p>
          </table:table-cell>
          <table:table-cell table:style-name="Table1.A1" office:value-type="string">
            <text:p text:style-name="P24">~19,9 GB</text:p>
          </table:table-cell>
        </table:table-row>
      </table:table>
      <text:p text:style-name="P26"/>
      <text:h text:style-name="P27" text:outline-level="3"/>
      <text:h text:style-name="P27" text:outline-level="3" text:is-list-header="true"/>
      <text:h text:style-name="P27" text:outline-level="3"/>
      <text:h text:style-name="P27" text:outline-level="3"/>
      <text:h text:style-name="P27" text:outline-level="3"/>
      <text:h text:style-name="P27" text:outline-level="3"/>
      <text:h text:style-name="P27" text:outline-level="3"/>
      <text:h text:style-name="P27" text:outline-level="3"/>
      <text:p text:style-name="Standard"/>
      <text:p text:style-name="Standard"/>
      <text:h text:style-name="Heading_20_3" text:outline-level="3"><text:soft-page-break/>2.1.2 Diagrama de arquitectura</text:h>
      <text:p text:style-name="P28"/>
      <text:p text:style-name="P26"><draw:frame draw:style-name="fr2" draw:name="Image24" text:anchor-type="char" svg:width="17cm" svg:height="11cm" draw:z-index="23"><draw:image xlink:href="Pictures/10000000000006A40000044CCD1D4DD9.png" xlink:type="simple" xlink:show="embed" xlink:actuate="onLoad" draw:mime-type="image/png"/></draw:frame></text:p>
      <text:h text:style-name="Heading_20_3" text:outline-level="3">2.1.<text:span text:style-name="T10">3</text:span> Descripción de servicios</text:h>
      <text:p text:style-name="P12"/>
      <text:list text:style-name="L3">
        <text:list-item>
          <text:p text:style-name="P29"><text:span text:style-name="T4">AWS IoT Core</text:span> → Reemplaza la escucha TCP del servidor Java. Cada sensor industrial se registra como un Thing con un certificado X.509. Los dispositivos publican en el topic itech/sensors/{factory_id}/{machine_id}/{sensor_id} usando MQTT sobre TLS. El Rules Engine enruta los mensajes a Kinesis Data Streams sin necesidad de servidor intermediario. <text:span text:style-name="T4">Equivalencia en el proyecto</text:span>: <text:span text:style-name="T8">Main.java</text:span> → <text:span text:style-name="T8">ServerSocket.accept()</text:span> + <text:span text:style-name="T8">ConnectionQueue</text:span>.</text:p>
          <text:p text:style-name="P29"/>
        </text:list-item>
        <text:list-item>
          <text:p text:style-name="P29"><text:span text:style-name="T4">Amazon Kinesis Data Streams </text:span>→ Buffer de alta capacidad que desacopla la ingesta de los consumidores. Con 2 shards admite hasta 2 MB/s de entrada (más que suficiente para los 300 sensores a 256 bytes cada 10 s). Si la escala crece, se añaden shards sin interrupción del servicio. <text:span text:style-name="T4">Equivalencia en el proyecto</text:span>: <text:span text:style-name="T8">ConnectionQueue.java</text:span> — cola de conexiones que alimenta el pool de hilos.</text:p>
        </text:list-item>
        <text:list-item>
          <text:p text:style-name="P29"><text:soft-page-break/><text:span text:style-name="T4">AWS Lambda – Anomaly Engine</text:span> → Función que consume el stream de Kinesis. Evalúa los umbrales definidos para cada tipo de sensor (igual que <text:span text:style-name="T8">AnomalyHandler.java</text:span>), persiste la lectura en RDS y, cuando detecta una anomalía crítica, escribe en la tabla anomalies y llama a la API XML-RPC de Odoo para crear el ticket de mantenimiento (igual que <text:span text:style-name="T8">OdooClient.java</text:span>).</text:p>
          <text:p text:style-name="P29"/>
        </text:list-item>
        <text:list-item>
          <text:p text:style-name="P29"><text:span text:style-name="T4">AWS Lambda - Data Aggregator</text:span> → Segunda función consumidora del stream. Calcula agregaciones por ventanas de tiempo (media móvil de 1 minuto, máximos y mínimos del turno) y las guarda en RDS para su consulta desde las aplicaciones frontend. <text:span text:style-name="T4">Equivalencia en el proyecto</text:span>: <text:span text:style-name="T8">SensorDataDAO.java →</text:span> métodos de inserción y consulta de históricos.</text:p>
          <text:p text:style-name="P29"/>
        </text:list-item>
        <text:list-item>
          <text:p text:style-name="P29"><text:span text:style-name="T4">Amazon RDS MySQL (Multi-AZ) </text:span>→ Base de datos administrada con la misma estructura de la Evidencia 4 (database_script.sql). La configuración Multi-AZ garantiza failover automático con RPO &lt; 1 minuto. Instancia db.t3.small con 100 GB de almacenamiento gp3.</text:p>
          <text:p text:style-name="P29"/>
        </text:list-item>
        <text:list-item>
          <text:p text:style-name="P29"><text:span text:style-name="T4">Amazon EC2 - Java HTTP API (Auto Scaling Group) </text:span>→ El servidor HTTP Java (<text:span text:style-name="T8">HTTPHandler.java</text:span>) se empaqueta como imagen <text:span text:style-name="T11">Docker</text:span> y se despliega en un Auto Scaling Group con un mínimo de 1 instancia y un máximo de 4. El Application Load Balancer distribuye el tráfico HTTPS desde las apps ITechApp e ItechWeb.</text:p>
          <text:p text:style-name="P29"/>
        </text:list-item>
        <text:list-item>
          <text:p text:style-name="P29"><text:span text:style-name="T4">Amazon EC2 - Odoo ERP</text:span> → Instancia dedicada t3.medium con Odoo 17 y el módulo <text:span text:style-name="T12">iot_maintenance.</text:span> Recibe las llamadas XML-RPC desde Lambda/Anomaly Engine para crear los tickets de mantenimiento correctivo.</text:p>
          <text:p text:style-name="P29"/>
        </text:list-item>
        <text:list-item>
          <text:p text:style-name="P29"><text:span text:style-name="T4">Amazon S3 - Data Lake </text:span>→ Los mensajes raw de Kinesis se archivan también en S3 (vía Kinesis Firehose) en formato JSON particionado por fecha. Permite análisis histórico posterior con Amazon Athena sin impactar la base de datos operacional.</text:p>
          <text:p text:style-name="P29"/>
        </text:list-item>
        <text:list-item>
          <text:p text:style-name="P29"><text:span text:style-name="T4">Amazon SNS </text:span>→ Cuando Anomaly Engine detecta una alerta crítica, publica en un topic SNS. Los técnicos suscritos reciben notificaciones push en ITechApp vía AWS SNS Mobile Push (FCM para Android). <text:span text:style-name="T4">Equivalencia en el proyecto</text:span>: actualmente las alertas se consultan en la pantalla /alertas de la app vía polling HTTP.</text:p>
          <text:p text:style-name="P29"/>
        </text:list-item>
        <text:list-item>
          <text:p text:style-name="P30"><text:soft-page-break/><text:span text:style-name="T4">Amazon CloudWatch</text:span> → Recopila logs de Lambda, métricas de Kinesis, RDS y EC2. Se configuran alarmas para: latencia del stream &gt; 5 s, tasa de errores de Lambda &gt; 1%, CPU de RDS &gt; 80%.</text:p>
        </text:list-item>
      </text:list>
      <text:p text:style-name="P31"/>
      <text:h text:style-name="P27" text:outline-level="3">2.1.<text:span text:style-name="T10">4</text:span> Tabla de Costes Mensuales Estimados</text:h>
      <text:p text:style-name="P32"/>
      <text:p text:style-name="P32">Escenario: 300 sensores, 77,76 millones de mensajes/mes.</text:p>
      <text:p text:style-name="P32"/>
      <table:table table:name="Table2" table:style-name="Table2">
        <table:table-column table:style-name="Table2.A" table:number-columns-repeated="5"/>
        <table:table-header-rows>
          <table:table-row>
            <table:table-cell table:style-name="Table2.A1" office:value-type="string">
              <text:p text:style-name="P33">Servicio</text:p>
            </table:table-cell>
            <table:table-cell table:style-name="Table2.A1" office:value-type="string">
              <text:p text:style-name="P33">Configuración</text:p>
            </table:table-cell>
            <table:table-cell table:style-name="Table2.A1" office:value-type="string">
              <text:p text:style-name="P33">Unidad de precio</text:p>
            </table:table-cell>
            <table:table-cell table:style-name="Table2.A1" office:value-type="string">
              <text:p text:style-name="P33">Consumo estimado/mes</text:p>
            </table:table-cell>
            <table:table-cell table:style-name="Table2.A1" office:value-type="string">
              <text:p text:style-name="P33">Coste estimado (USD/mes)</text:p>
            </table:table-cell>
          </table:table-row>
        </table:table-header-rows>
        <table:table-row>
          <table:table-cell table:style-name="Table2.A1" office:value-type="string">
            <text:p text:style-name="P34"><text:span text:style-name="T4">AWS IoT Core</text:span> — Conectividad</text:p>
          </table:table-cell>
          <table:table-cell table:style-name="Table2.A1" office:value-type="string">
            <text:p text:style-name="P34">300 devices × 43.800 min</text:p>
          </table:table-cell>
          <table:table-cell table:style-name="Table2.A1" office:value-type="string">
            <text:p text:style-name="P34">$0,08 / millón min-conexión</text:p>
          </table:table-cell>
          <table:table-cell table:style-name="Table2.A1" office:value-type="string">
            <text:p text:style-name="P34">13.140.000 min</text:p>
          </table:table-cell>
          <table:table-cell table:style-name="Table2.A1" office:value-type="string">
            <text:p text:style-name="P35">$1,05</text:p>
          </table:table-cell>
        </table:table-row>
        <table:table-row>
          <table:table-cell table:style-name="Table2.A1" office:value-type="string">
            <text:p text:style-name="P34"><text:span text:style-name="T4">AWS IoT Core</text:span> — Mensajería</text:p>
          </table:table-cell>
          <table:table-cell table:style-name="Table2.A1" office:value-type="string">
            <text:p text:style-name="P34">77,76 M mensajes</text:p>
          </table:table-cell>
          <table:table-cell table:style-name="Table2.A1" office:value-type="string">
            <text:p text:style-name="P34">$1,00 / millón mensajes</text:p>
          </table:table-cell>
          <table:table-cell table:style-name="Table2.A1" office:value-type="string">
            <text:p text:style-name="P34">77,76 M</text:p>
          </table:table-cell>
          <table:table-cell table:style-name="Table2.A1" office:value-type="string">
            <text:p text:style-name="P35">$77,76</text:p>
          </table:table-cell>
        </table:table-row>
        <table:table-row>
          <table:table-cell table:style-name="Table2.A1" office:value-type="string">
            <text:p text:style-name="P34"><text:span text:style-name="T4">AWS IoT Core</text:span> — Rules Engine</text:p>
          </table:table-cell>
          <table:table-cell table:style-name="Table2.A1" office:value-type="string">
            <text:p text:style-name="P34">77,76 M reglas</text:p>
          </table:table-cell>
          <table:table-cell table:style-name="Table2.A1" office:value-type="string">
            <text:p text:style-name="P34">$0,15 / millón ejecuciones</text:p>
          </table:table-cell>
          <table:table-cell table:style-name="Table2.A1" office:value-type="string">
            <text:p text:style-name="P34">77,76 M</text:p>
          </table:table-cell>
          <table:table-cell table:style-name="Table2.A1" office:value-type="string">
            <text:p text:style-name="P35">$11,66</text:p>
          </table:table-cell>
        </table:table-row>
        <table:table-row>
          <table:table-cell table:style-name="Table2.A1" office:value-type="string">
            <text:p text:style-name="P34"><text:span text:style-name="T4">Kinesis Data Streams</text:span> — Shard hours</text:p>
          </table:table-cell>
          <table:table-cell table:style-name="Table2.A1" office:value-type="string">
            <text:p text:style-name="P34">2 shards × 720 h</text:p>
          </table:table-cell>
          <table:table-cell table:style-name="Table2.A1" office:value-type="string">
            <text:p text:style-name="P34">$0,015 / shard-hora</text:p>
          </table:table-cell>
          <table:table-cell table:style-name="Table2.A1" office:value-type="string">
            <text:p text:style-name="P34">1.440 shard-h</text:p>
          </table:table-cell>
          <table:table-cell table:style-name="Table2.A1" office:value-type="string">
            <text:p text:style-name="P35">$21,60</text:p>
          </table:table-cell>
        </table:table-row>
        <table:table-row>
          <table:table-cell table:style-name="Table2.A1" office:value-type="string">
            <text:p text:style-name="P34"><text:span text:style-name="T4">Kinesis Data Streams</text:span> — PUT</text:p>
          </table:table-cell>
          <table:table-cell table:style-name="Table2.A1" office:value-type="string">
            <text:p text:style-name="P34">77,76 M unidades</text:p>
          </table:table-cell>
          <table:table-cell table:style-name="Table2.A1" office:value-type="string">
            <text:p text:style-name="P34">$0,014 / millón PUT</text:p>
          </table:table-cell>
          <table:table-cell table:style-name="Table2.A1" office:value-type="string">
            <text:p text:style-name="P34">77,76 M</text:p>
          </table:table-cell>
          <table:table-cell table:style-name="Table2.A1" office:value-type="string">
            <text:p text:style-name="P35">$1,09</text:p>
          </table:table-cell>
        </table:table-row>
        <table:table-row>
          <table:table-cell table:style-name="Table2.A1" office:value-type="string">
            <text:p text:style-name="P34"><text:span text:style-name="T4">AWS Lambda</text:span> — Invocaciones</text:p>
          </table:table-cell>
          <table:table-cell table:style-name="Table2.A1" office:value-type="string">
            <text:p text:style-name="P34">77,76 M llamadas</text:p>
          </table:table-cell>
          <table:table-cell table:style-name="Table2.A1" office:value-type="string">
            <text:p text:style-name="P34">$0,20 / millón (tras 1M free)</text:p>
          </table:table-cell>
          <table:table-cell table:style-name="Table2.A1" office:value-type="string">
            <text:p text:style-name="P34">76,76 M</text:p>
          </table:table-cell>
          <table:table-cell table:style-name="Table2.A1" office:value-type="string">
            <text:p text:style-name="P35">$15,35</text:p>
          </table:table-cell>
        </table:table-row>
        <table:table-row>
          <table:table-cell table:style-name="Table2.A1" office:value-type="string">
            <text:p text:style-name="P34"><text:span text:style-name="T4">AWS Lambda</text:span> — Duración</text:p>
          </table:table-cell>
          <table:table-cell table:style-name="Table2.A1" office:value-type="string">
            <text:p text:style-name="P34">200 ms avg, 256 MB</text:p>
          </table:table-cell>
          <table:table-cell table:style-name="Table2.A1" office:value-type="string">
            <text:p text:style-name="P34">$0,0000166667 / GB-s</text:p>
          </table:table-cell>
          <table:table-cell table:style-name="Table2.A1" office:value-type="string">
            <text:p text:style-name="P34">3.888.000 GB-s</text:p>
          </table:table-cell>
          <table:table-cell table:style-name="Table2.A1" office:value-type="string">
            <text:p text:style-name="P35">$64,80</text:p>
          </table:table-cell>
        </table:table-row>
        <table:table-row>
          <table:table-cell table:style-name="Table2.A1" office:value-type="string">
            <text:p text:style-name="P34"><text:span text:style-name="T4">Amazon RDS MySQL</text:span> — Instancia</text:p>
          </table:table-cell>
          <table:table-cell table:style-name="Table2.A1" office:value-type="string">
            <text:p text:style-name="P34">db.t3.small Multi-AZ</text:p>
          </table:table-cell>
          <table:table-cell table:style-name="Table2.A1" office:value-type="string">
            <text:p text:style-name="P34">$0,034 / hora</text:p>
          </table:table-cell>
          <table:table-cell table:style-name="Table2.A1" office:value-type="string">
            <text:p text:style-name="P34">720 h</text:p>
          </table:table-cell>
          <table:table-cell table:style-name="Table2.A1" office:value-type="string">
            <text:p text:style-name="P35">$24,48</text:p>
          </table:table-cell>
        </table:table-row>
        <table:table-row>
          <table:table-cell table:style-name="Table2.A1" office:value-type="string">
            <text:p text:style-name="P34"><text:span text:style-name="T4">Amazon RDS MySQL</text:span> — Almacenamiento</text:p>
          </table:table-cell>
          <table:table-cell table:style-name="Table2.A1" office:value-type="string">
            <text:p text:style-name="P34">100 GB gp3 Multi-AZ</text:p>
          </table:table-cell>
          <table:table-cell table:style-name="Table2.A1" office:value-type="string">
            <text:p text:style-name="P34">$0,23 / GB-mes</text:p>
          </table:table-cell>
          <table:table-cell table:style-name="Table2.A1" office:value-type="string">
            <text:p text:style-name="P34">100 GB</text:p>
          </table:table-cell>
          <table:table-cell table:style-name="Table2.A1" office:value-type="string">
            <text:p text:style-name="P35">$23,00</text:p>
          </table:table-cell>
        </table:table-row>
        <table:table-row>
          <table:table-cell table:style-name="Table2.A1" office:value-type="string">
            <text:p text:style-name="P34"><text:span text:style-name="T4">Amazon EC2</text:span> — Java API (×2 t3.small)</text:p>
          </table:table-cell>
          <table:table-cell table:style-name="Table2.A1" office:value-type="string">
            <text:p text:style-name="P34">2 × t3.small</text:p>
          </table:table-cell>
          <table:table-cell table:style-name="Table2.A1" office:value-type="string">
            <text:p text:style-name="P34">$0,0208 / hora</text:p>
          </table:table-cell>
          <table:table-cell table:style-name="Table2.A1" office:value-type="string">
            <text:p text:style-name="P34">1.440 h</text:p>
          </table:table-cell>
          <table:table-cell table:style-name="Table2.A1" office:value-type="string">
            <text:p text:style-name="P35">$29,95</text:p>
          </table:table-cell>
        </table:table-row>
        <table:table-row>
          <table:table-cell table:style-name="Table2.A1" office:value-type="string">
            <text:p text:style-name="P34"><text:span text:style-name="T4">Amazon EC2</text:span> — Odoo (t3.medium)</text:p>
          </table:table-cell>
          <table:table-cell table:style-name="Table2.A1" office:value-type="string">
            <text:p text:style-name="P34">1 × t3.medium</text:p>
          </table:table-cell>
          <table:table-cell table:style-name="Table2.A1" office:value-type="string">
            <text:p text:style-name="P34">$0,0416 / hora</text:p>
          </table:table-cell>
          <table:table-cell table:style-name="Table2.A1" office:value-type="string">
            <text:p text:style-name="P34">720 h</text:p>
          </table:table-cell>
          <table:table-cell table:style-name="Table2.A1" office:value-type="string">
            <text:p text:style-name="P35">$29,95</text:p>
          </table:table-cell>
        </table:table-row>
        <table:table-row>
          <table:table-cell table:style-name="Table2.A1" office:value-type="string">
            <text:p text:style-name="P35">Application Load Balancer</text:p>
          </table:table-cell>
          <table:table-cell table:style-name="Table2.A1" office:value-type="string">
            <text:p text:style-name="P34">1 ALB, ~5 LCU-h</text:p>
          </table:table-cell>
          <table:table-cell table:style-name="Table2.A1" office:value-type="string">
            <text:p text:style-name="P34">$0,008/hora + $0,008/LCU-h</text:p>
          </table:table-cell>
          <table:table-cell table:style-name="Table2.A1" office:value-type="string">
            <text:p text:style-name="P34">720 h + 3.600 LCU-h</text:p>
          </table:table-cell>
          <table:table-cell table:style-name="Table2.A1" office:value-type="string">
            <text:p text:style-name="P35">$34,56</text:p>
          </table:table-cell>
        </table:table-row>
        <table:table-row>
          <table:table-cell table:style-name="Table2.A1" office:value-type="string">
            <text:p text:style-name="P34"><text:span text:style-name="T4">Amazon S3</text:span> — Almacenamiento <text:soft-page-break/>raw</text:p>
          </table:table-cell>
          <table:table-cell table:style-name="Table2.A1" office:value-type="string">
            <text:p text:style-name="P34">20 GB/mes acumulado</text:p>
          </table:table-cell>
          <table:table-cell table:style-name="Table2.A1" office:value-type="string">
            <text:p text:style-name="P34">$0,023 / GB-mes</text:p>
          </table:table-cell>
          <table:table-cell table:style-name="Table2.A1" office:value-type="string">
            <text:p text:style-name="P34">20 GB</text:p>
          </table:table-cell>
          <table:table-cell table:style-name="Table2.A1" office:value-type="string">
            <text:p text:style-name="P35">$0,46</text:p>
          </table:table-cell>
        </table:table-row>
        <table:table-row>
          <table:table-cell table:style-name="Table2.A1" office:value-type="string">
            <text:p text:style-name="P34"><text:span text:style-name="T4">Amazon S3</text:span> — Peticiones PUT</text:p>
          </table:table-cell>
          <table:table-cell table:style-name="Table2.A1" office:value-type="string">
            <text:p text:style-name="P34">vía Firehose</text:p>
          </table:table-cell>
          <table:table-cell table:style-name="Table2.A1" office:value-type="string">
            <text:p text:style-name="P34">$0,005 / 1.000 PUT</text:p>
          </table:table-cell>
          <table:table-cell table:style-name="Table2.A1" office:value-type="string">
            <text:p text:style-name="P34">77.760 PUT</text:p>
          </table:table-cell>
          <table:table-cell table:style-name="Table2.A1" office:value-type="string">
            <text:p text:style-name="P35">$0,39</text:p>
          </table:table-cell>
        </table:table-row>
        <table:table-row>
          <table:table-cell table:style-name="Table2.A1" office:value-type="string">
            <text:p text:style-name="P34"><text:span text:style-name="T4">Amazon SNS</text:span> — Notificaciones push</text:p>
          </table:table-cell>
          <table:table-cell table:style-name="Table2.A1" office:value-type="string">
            <text:p text:style-name="P34">~10.000 alertas/mes</text:p>
          </table:table-cell>
          <table:table-cell table:style-name="Table2.A1" office:value-type="string">
            <text:p text:style-name="P34">$0,50 / millón</text:p>
          </table:table-cell>
          <table:table-cell table:style-name="Table2.A1" office:value-type="string">
            <text:p text:style-name="P34">0,01 M</text:p>
          </table:table-cell>
          <table:table-cell table:style-name="Table2.A1" office:value-type="string">
            <text:p text:style-name="P35">$0,01</text:p>
          </table:table-cell>
        </table:table-row>
        <table:table-row>
          <table:table-cell table:style-name="Table2.A1" office:value-type="string">
            <text:p text:style-name="P34"><text:span text:style-name="T4">Amazon CloudWatch</text:span> — Logs</text:p>
          </table:table-cell>
          <table:table-cell table:style-name="Table2.A1" office:value-type="string">
            <text:p text:style-name="P34">~5 GB/mes</text:p>
          </table:table-cell>
          <table:table-cell table:style-name="Table2.A1" office:value-type="string">
            <text:p text:style-name="P34">$0,57 / GB ingestado</text:p>
          </table:table-cell>
          <table:table-cell table:style-name="Table2.A1" office:value-type="string">
            <text:p text:style-name="P34">5 GB</text:p>
          </table:table-cell>
          <table:table-cell table:style-name="Table2.A1" office:value-type="string">
            <text:p text:style-name="P35">$2,85</text:p>
          </table:table-cell>
        </table:table-row>
        <table:table-row>
          <table:table-cell table:style-name="Table2.A1" office:value-type="string">
            <text:p text:style-name="P34"><text:span text:style-name="T4">Amazon CloudWatch</text:span> — Métricas custom</text:p>
          </table:table-cell>
          <table:table-cell table:style-name="Table2.A1" office:value-type="string">
            <text:p text:style-name="P34">20 métricas</text:p>
          </table:table-cell>
          <table:table-cell table:style-name="Table2.A1" office:value-type="string">
            <text:p text:style-name="P34">$0,30 / métrica/mes</text:p>
          </table:table-cell>
          <table:table-cell table:style-name="Table2.A1" office:value-type="string">
            <text:p text:style-name="P34">20</text:p>
          </table:table-cell>
          <table:table-cell table:style-name="Table2.A1" office:value-type="string">
            <text:p text:style-name="P35">$6,00</text:p>
          </table:table-cell>
        </table:table-row>
        <table:table-row>
          <table:table-cell table:style-name="Table2.A1" office:value-type="string">
            <text:p text:style-name="P35">Transferencia de datos salientes</text:p>
          </table:table-cell>
          <table:table-cell table:style-name="Table2.A1" office:value-type="string">
            <text:p text:style-name="P34">apps → usuarios</text:p>
          </table:table-cell>
          <table:table-cell table:style-name="Table2.A1" office:value-type="string">
            <text:p text:style-name="P34">$0,09 / GB (tras 1 GB free)</text:p>
          </table:table-cell>
          <table:table-cell table:style-name="Table2.A1" office:value-type="string">
            <text:p text:style-name="P34">~10 GB</text:p>
          </table:table-cell>
          <table:table-cell table:style-name="Table2.A1" office:value-type="string">
            <text:p text:style-name="P35">$0,90</text:p>
          </table:table-cell>
        </table:table-row>
        <table:table-row>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5">TOTAL MENSUAL</text:p>
          </table:table-cell>
          <table:table-cell table:style-name="Table2.A1" office:value-type="string">
            <text:p text:style-name="P35">≈ $345,86 USD</text:p>
          </table:table-cell>
        </table:table-row>
      </table:table>
      <text:p text:style-name="P37"><text:span text:style-name="T4"/></text:p>
      <text:h text:style-name="P38" text:outline-level="2" text:is-list-header="true"><text:bookmark-start text:name="__RefHeading___Toc1514_2288906620"/><text:s/><text:span text:style-name="T13">2.2 (Sistemas de gestión) RA 3 – Integración con Odoo ERP</text:span><text:bookmark-end text:name="__RefHeading___Toc1514_2288906620"/></text:h>
      <text:p text:style-name="P39"/>
      <text:p text:style-name="P40"><text:span text:style-name="T14">Compromiso adquirido</text:span><text:span text:style-name="T15">: Código fuente en el backend Java que envíe peticiones a la API de Odoo en el momento en que se detecte una anomalía crítica, para generar automáticamente un ticket de intervención.</text:span></text:p>
      <text:p text:style-name="P41"/>
      <text:p text:style-name="P41">La integración se implementa en dos clases que trabajan juntas: <text:span text:style-name="T8">OdooClient.java</text:span> encapsula toda la comunicación con la API de Odoo, y <text:span text:style-name="T8">AnomalyHandler.java</text:span> decide cuándo invocarla.</text:p>
      <text:p text:style-name="P41"/>
      <text:p text:style-name="P41"><text:span text:style-name="T8">OdooClient</text:span> utiliza la API JSON-RPC de Odoo (endpoint /jsonrpc). Al arrancar el servidor, <text:span text:style-name="T8">getOdooUID()</text:span> realiza un login con el servicio common para obtener el UID de sesión, que se cachea estáticamente para no autenticarse en cada llamada. Cuando se detecta una anomalía, <text:span text:style-name="T8">createTicket()</text:span> llama al servicio object con el método <text:span text:style-name="T12">execute_kw</text:span> sobre el modelo <text:span text:style-name="T12">helpdesk.ticket</text:span>, pasando el nombre y descripción del incidente.</text:p>
      <text:p text:style-name="P41"/>
      <text:p text:style-name="P41"><text:span text:style-name="T8">AnomalyHandler.handleAnomaly()</text:span> aplica una regla configurable: si <text:span text:style-name="T11">MULTIPLE_ANOMALY_REPORTING_AMOUNT</text:span> es 1, crea el ticket en el primer dato anómalo; si es mayor, <text:span text:style-name="T8">checkMultipleAnomaly()</text:span> consulta la base de datos para verificar que hay al menos N anomalías del mismo sensor en el último intervalo de tiempo antes de abrir el ticket. Esto evita falsos positivos por lecturas puntuales.</text:p>
      <text:p text:style-name="P41"/>
      <text:p text:style-name="P41">En paralelo al sistema Java, el módulo Odoo personalizado <text:span text:style-name="T12">iot_maintenance</text:span> define el modelo <text:span text:style-name="T12">helpdesk.ticket</text:span> con los campos necesarios y las vistas de gestión dentro del ERP.</text:p>
      <text:p text:style-name="P41"/>
      <text:p text:style-name="P39">Dónde verificarlo:</text:p>
      <text:p text:style-name="P39"/>
      <text:p text:style-name="P42">src/main/java/com/itech/odoo/OdooClient.java→ <text:span text:style-name="T8">login()</text:span> y <text:span text:style-name="T8">createTicket()</text:span></text:p>
      <text:p text:style-name="P43"><draw:frame draw:style-name="fr3" draw:name="Image2" text:anchor-type="char" svg:x="0cm" svg:y="0.309cm" svg:width="17cm" svg:height="4.389cm" draw:z-index="1"><draw:image xlink:href="Pictures/100000000000037E00000221EA6CD148.png" xlink:type="simple" xlink:show="embed" xlink:actuate="onLoad" draw:mime-type="image/png"/></draw:frame></text:p>
      <text:p text:style-name="P42"><text:soft-page-break/>src/main/java/com/itech/database/anomalyHandling/AnomalyHandler.java→ <text:span text:style-name="T8">handleAnomaly()</text:span>, <text:span text:style-name="T8">checkMultipleAnomaly()</text:span></text:p>
      <text:p text:style-name="P43"><draw:frame draw:style-name="fr1" draw:name="Image3" text:anchor-type="char" svg:x="0.106cm" svg:y="0.226cm" svg:width="17cm" svg:height="10.093cm" draw:z-index="2"><draw:image xlink:href="Pictures/100000000000038500000217C953E637.png" xlink:type="simple" xlink:show="embed" xlink:actuate="onLoad" draw:mime-type="image/png"/></draw:frame></text:p>
      <text:p text:style-name="P42">odoo/iot_maintenance/→ módulo Odoo personalizado</text:p>
      <text:p text:style-name="P42"><draw:frame draw:style-name="fr2" draw:name="Image4" text:anchor-type="char" svg:width="17cm" svg:height="7.825cm" draw:z-index="3"><draw:image xlink:href="Pictures/10000000000005550000027488EBC010.png" xlink:type="simple" xlink:show="embed" xlink:actuate="onLoad" draw:mime-type="image/png"/></draw:frame></text:p>
      <text:p text:style-name="P42"/>
      <text:p text:style-name="P42"/>
      <text:p text:style-name="P42"/>
      <text:p text:style-name="P42"><text:soft-page-break/>odoo/iot_maintenance/models/helpdesk_ticket.py <text:s text:c="7"/>→ definición del modelo</text:p>
      <text:p text:style-name="P44"><draw:frame draw:style-name="fr1" draw:name="Image5" text:anchor-type="char" svg:x="0cm" svg:y="0.212cm" svg:width="17cm" svg:height="6.729cm" draw:z-index="4"><draw:image xlink:href="Pictures/10000000000005340000020F3DCB0C29.png" xlink:type="simple" xlink:show="embed" xlink:actuate="onLoad" draw:mime-type="image/png"/></draw:frame></text:p>
      <text:p text:style-name="P44"/>
      <text:h text:style-name="P45" text:outline-level="2"><text:bookmark-start text:name="__RefHeading___Toc1516_2288906620"/>2.3 (Programación de servicios y procesos) RA 3 – Pool de hilos concurrente<text:bookmark-end text:name="__RefHeading___Toc1516_2288906620"/></text:h>
      <text:p text:style-name="P12"/>
      <text:p text:style-name="P46"><text:span text:style-name="T4">Compromiso adquirido</text:span>: Código fuente en el backend Java implementando un pool de hilos que reciba, parsee y procese de forma simultánea e independiente los flujos de datos masivos de los distintos sensores.</text:p>
      <text:p text:style-name="P46"/>
      <text:p text:style-name="P46"/>
      <text:p text:style-name="P46">La concurrencia se implementa mediante una lista de espera de Java Sockets con <text:span text:style-name="T8">ConnectionQueue</text:span> y <text:span text:style-name="T8">ClientHandler.</text:span></text:p>
      <text:p text:style-name="P46"/>
      <text:p text:style-name="P46"><text:span text:style-name="T8">ConnectionQueue</text:span> mantiene una <text:span text:style-name="T8">Queue&lt;Socket&gt;</text:span> con capacidad máxima configurable. El método <text:span text:style-name="T8">putInQueue()</text:span> es <text:span text:style-name="T8">synchronized</text:span>: si la cola está llena, el hilo principal llama a <text:span text:style-name="T8">wait()</text:span> hasta que un consumidor libere espacio. De la misma manera, <text:span text:style-name="T8">getFromQueue() </text:span>bloquea al consumidor con <text:span text:style-name="T8">wait()</text:span> si la cola está vacía, y usa <text:span text:style-name="T8">notifyAll() </text:span>para despertar a todos los hilos al modificar el estado.</text:p>
      <text:p text:style-name="P46"/>
      <text:p text:style-name="P46">Al construirse, <text:span text:style-name="T8">ConnectionQueue</text:span> lanza tantos hilos <text:span text:style-name="T8">ClientHandler</text:span> como indique la configuración. Cada <text:span text:style-name="T8">ClientHandler </text:span>extiende <text:span text:style-name="T8">Thread</text:span> y ejecuta un bucle infinito: extrae un socket de la cola, lee la primera línea del mensaje y decide el tipo de conexión. Si empieza por <text:span text:style-name="T16">GET</text:span>, <text:span text:style-name="T16">POST</text:span>, <text:span text:style-name="T16">PUT</text:span> o <text:span text:style-name="T16">DELETE</text:span>, delega en <text:span text:style-name="T8">HTTPHandler</text:span> (petición de una app frontend); en cualquier otro caso, delega en TCPHandler (mensaje de sensor industrial). Esta distinción permite que el mismo pool atienda simultáneamente sensores y aplicaciones cliente.</text:p>
      <text:p text:style-name="P46"><text:soft-page-break/></text:p>
      <text:p text:style-name="P47">Dónde verificarlo:</text:p>
      <text:p text:style-name="P47"/>
      <text:p text:style-name="P48">src/main/java/com/itech/ConnectionQueue.java → cola con wait/notifyAll</text:p>
      <text:p text:style-name="P48"/>
      <text:p text:style-name="P48"><draw:frame draw:style-name="fr4" draw:name="Image6" text:anchor-type="char" svg:width="17cm" svg:height="10.806cm" draw:z-index="5"><draw:image xlink:href="Pictures/100000000000038A000002401947590A.png" xlink:type="simple" xlink:show="embed" xlink:actuate="onLoad" draw:mime-type="image/png"/></draw:frame></text:p>
      <text:p text:style-name="P48">src/main/java/com/itech/clientHandlers/ClientHandler.java→ detección HTTP vs TCP, bucle de worker</text:p>
      <text:p text:style-name="P48"/>
      <text:p text:style-name="P48"><draw:frame draw:style-name="fr5" draw:name="Image7" text:anchor-type="char" svg:width="17cm" svg:height="6.521cm" draw:z-index="6"><draw:image xlink:href="Pictures/100000000000039000000237A44DA200.png" xlink:type="simple" xlink:show="embed" xlink:actuate="onLoad" draw:mime-type="image/png"/></draw:frame></text:p>
      <text:p text:style-name="P48"><text:soft-page-break/>TCPHandler.java → formateo y persistencia de lecturas de sensor</text:p>
      <text:p text:style-name="P48"><draw:frame draw:style-name="fr6" draw:name="Image8" text:anchor-type="char" svg:x="0.071cm" svg:y="0.141cm" svg:width="17cm" svg:height="9.022cm" draw:z-index="7"><draw:image xlink:href="Pictures/1000000000000303000001D53A375720.png" xlink:type="simple" xlink:show="embed" xlink:actuate="onLoad" draw:mime-type="image/png"/></draw:frame></text:p>
      <text:p text:style-name="P48">HTTPHandler.java → API REST (manual) para el frontend</text:p>
      <text:p text:style-name="P48"/>
      <text:p text:style-name="P49"><draw:frame draw:style-name="fr4" draw:name="Image9" text:anchor-type="char" svg:width="17cm" svg:height="10.924cm" draw:z-index="8"><draw:image xlink:href="Pictures/10000000000003740000023881858E5F.png" xlink:type="simple" xlink:show="embed" xlink:actuate="onLoad" draw:mime-type="image/png"/></draw:frame></text:p>
      <text:h text:style-name="Heading_20_2" text:outline-level="2"><text:bookmark-start text:name="__RefHeading___Toc1518_2288906620"/><text:soft-page-break/>2.4 (Acceso a datos) RA 2 - DAOs con JDBC<text:bookmark-end text:name="__RefHeading___Toc1518_2288906620"/></text:h>
      <text:p text:style-name="Standard"/>
      <text:p text:style-name="P12"><text:span text:style-name="T4">Compromiso adquirido</text:span>: Clases DAO en Java utilizando JDBC que ejecuten operaciones CRUD sobre la base de datos relacional, archivo .sql exportado con la estructura y script que genere un lote de datos.</text:p>
      <text:p text:style-name="P12"/>
      <text:p text:style-name="P12">La capa de acceso a datos sigue el patrón DAO (Data Access Object): cada entidad del dominio tiene su propia clase con métodos estáticos que construyen y ejecutan <text:span text:style-name="T8">PreparedStatement</text:span> contra MySQL. El uso de <text:span text:style-name="T8">PreparedStatement</text:span> en lugar de concatenación de strings previene inyección SQL en todos los puntos de entrada.</text:p>
      <text:p text:style-name="P50"><text:span text:style-name="T8">DatabaseManager</text:span> centraliza la gestión de conexiones mediante un pool, devolviendo una <text:span text:style-name="T8">Connection</text:span> lista con <text:span text:style-name="T8">getConnection()</text:span>.</text:p>
      <text:p text:style-name="P50"/>
      <text:p text:style-name="P50">Los cinco DAOs son:</text:p>
      <text:list text:style-name="L4">
        <text:list-item>
          <text:p text:style-name="P51"><text:span text:style-name="T8">FactoryDAO</text:span> — consulta fábricas por ID y por máquina.</text:p>
        </text:list-item>
        <text:list-item>
          <text:p text:style-name="P51"><text:span text:style-name="T8">MachineDAO </text:span>— consulta máquinas, actualiza su estado (hasGreenState) y verifica si tienen anomalías recientes.</text:p>
        </text:list-item>
        <text:list-item>
          <text:p text:style-name="P51"><text:span text:style-name="T8">SensorDAO</text:span> — valida que un sensor pertenece a una máquina y que su tipo es coherente.</text:p>
        </text:list-item>
        <text:list-item>
          <text:p text:style-name="P51"><text:span text:style-name="T8">SensorDataDAO</text:span> — inserta lecturas, evalúa el umbral de anomalía durante la inserción y recupera el histórico por sensor.</text:p>
        </text:list-item>
        <text:list-item>
          <text:p text:style-name="P51"><text:span text:style-name="T8">AnomalyDAO</text:span> — registra anomalías con su timestamp, tipo y valor.</text:p>
        </text:list-item>
      </text:list>
      <text:p text:style-name="P50"/>
      <text:p text:style-name="P12">El archivo <text:span text:style-name="T16">database_script.sql</text:span> contiene el DDL completo del esquema (tablas factories, machines, sensors, sensor_data, anomalies, data_units) y un bloque de datos de prueba con fábricas, máquinas y sensores de ejemplo.</text:p>
      <text:p text:style-name="P12"/>
      <text:p text:style-name="P52">Dónde verificarlo:</text:p>
      <text:p text:style-name="P52"/>
      <text:p text:style-name="P49">src/main/java/com/itech/database/DAOs/ → los cinco DAOs</text:p>
      <text:p text:style-name="P49"><draw:frame draw:style-name="fr1" draw:name="Image10" text:anchor-type="char" svg:x="5.611cm" svg:y="0.169cm" svg:width="7.19cm" svg:height="5.549cm" draw:z-index="9"><draw:image xlink:href="Pictures/10000000000000B80000008EE0D7AC01.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text:soft-page-break/></text:p>
      <text:p text:style-name="P49">src/main/java/com/itech/database/DatabaseManager.java → gestión del pool de conexiones</text:p>
      <text:p text:style-name="P49"/>
      <text:p text:style-name="P49"><draw:frame draw:style-name="fr7" draw:name="Image11" text:anchor-type="char" svg:width="17cm" svg:height="7.472cm" draw:z-index="10"><draw:image xlink:href="Pictures/1000000000000362000002500109935B.png" xlink:type="simple" xlink:show="embed" xlink:actuate="onLoad" draw:mime-type="image/png"/></draw:frame></text:p>
      <text:p text:style-name="P49">src/main/java/com/itech/database/database_script.sql → esquema DDL + datos de prueba</text:p>
      <text:p text:style-name="P49"/>
      <text:p text:style-name="P49"><draw:frame draw:style-name="fr4" draw:name="Image12" text:anchor-type="char" svg:width="17cm" svg:height="10.855cm" draw:z-index="11"><draw:image xlink:href="Pictures/1000000000000391000002474B9A06A9.png" xlink:type="simple" xlink:show="embed" xlink:actuate="onLoad" draw:mime-type="image/png"/></draw:frame></text:p>
      <text:h text:style-name="P53" text:outline-level="2"><text:bookmark-start text:name="__RefHeading___Toc1520_2288906620"/><text:soft-page-break/>2.5 (Programación multimedia y dispositivos móviles) RA 2 — Aplicación React Native<text:bookmark-end text:name="__RefHeading___Toc1520_2288906620"/></text:h>
      <text:p text:style-name="P12"/>
      <text:p text:style-name="P12"><text:span text:style-name="T4">Compromiso adquirido</text:span>: Código fuente de la aplicación móvil en React Native con dashboard general, pantallas de detalle por máquina y sistema de alertas.</text:p>
      <text:p text:style-name="P12"/>
      <text:p text:style-name="P12">ITechApp está desarrollada con <text:span text:style-name="T4">React Native</text:span> + <text:span text:style-name="T4">Expo</text:span> y usa <text:span text:style-name="T4">Expo Router</text:span> para la navegación, con una estructura de tres niveles: un stack raíz que contiene un drawer lateral, que a su vez incluye un tab navigator para las pantallas principales.</text:p>
      <text:p text:style-name="P12"/>
      <text:p text:style-name="P12">Las tres pantallas del tab navigator cubren los requisitos de la evidencia:</text:p>
      <text:p text:style-name="P12"/>
      <text:list text:style-name="L5">
        <text:list-item>
          <text:p text:style-name="P54"><text:span text:style-name="T4">Dashboard</text:span> (/dashboard) — muestra un resumen de todas las fábricas con el número de máquinas activas e incidentes.</text:p>
        </text:list-item>
        <text:list-item>
          <text:p text:style-name="P54"><text:span text:style-name="T4">Sensores</text:span> (/sensores) — listado de sensores con su última lectura y unidad.</text:p>
        </text:list-item>
        <text:list-item>
          <text:p text:style-name="P54"><text:span text:style-name="T4">Alertas</text:span> (/alertas) — registro de anomalías recientes con timestamp, tipo de sensor, valor detectado y máquina afectada.</text:p>
        </text:list-item>
      </text:list>
      <text:p text:style-name="P12"/>
      <text:p text:style-name="P55">Fuera del tab navigator, hay pantallas de detalle accesibles desde el drawer o por navegación: /fabricas lista todas las fábricas, y desde ahí se puede navegar a /screens/fabrica, /screens/maquina y /screens/sensor para ver el estado y el histórico de lecturas de cada elemento.</text:p>
      <text:p text:style-name="P55"/>
      <text:p text:style-name="P55">Cada pantalla consume un hook personalizado (<text:span text:style-name="T11">useFactories</text:span>, <text:span text:style-name="T11">useMachines</text:span>, <text:span text:style-name="T11">useSensors</text:span>, <text:span text:style-name="T11">useSensorData</text:span>, <text:span text:style-name="T11">useAnomalies</text:span>) que hace polling HTTP periódico al servidor Java y devuelve los datos tipados con sus interfaces <text:span text:style-name="T11">TypeScript</text:span> correspondientes.</text:p>
      <text:p text:style-name="P55"/>
      <text:p text:style-name="P56">Dónde verificarlo:</text:p>
      <text:p text:style-name="P57"/>
      <text:p text:style-name="P57">ITechApp/app/(stack)/(drawer)/(tabs)/dashboard/ → pantalla dashboard</text:p>
      <text:p text:style-name="P57"/>
      <text:p text:style-name="P57"><draw:frame draw:style-name="fr2" draw:name="Image13" text:anchor-type="char" svg:width="17cm" svg:height="10.933cm" draw:z-index="12"><draw:image xlink:href="Pictures/100000000000038C00000248EC2D6220.png" xlink:type="simple" xlink:show="embed" xlink:actuate="onLoad" draw:mime-type="image/png"/></draw:frame><text:soft-page-break/></text:p>
      <text:p text:style-name="P57">ITechApp/app/(stack)/(drawer)/(tabs)/alertas/ → listado de anomalías</text:p>
      <text:p text:style-name="P57"/>
      <text:p text:style-name="P57"><draw:frame draw:style-name="fr8" draw:name="Image14" text:anchor-type="char" svg:width="17cm" svg:height="9.723cm" draw:z-index="13"><draw:image xlink:href="Pictures/100000000000037F0000024DE181F69F.png" xlink:type="simple" xlink:show="embed" xlink:actuate="onLoad" draw:mime-type="image/png"/></draw:frame></text:p>
      <text:p text:style-name="P57"><text:soft-page-break/>ITechApp/app/(stack)/(drawer)/(tabs)/sensores/ → listado de sensores</text:p>
      <text:p text:style-name="P57"/>
      <text:p text:style-name="P57"><draw:frame draw:style-name="fr9" draw:name="Image15" text:anchor-type="char" svg:width="17cm" svg:height="8.786cm" draw:z-index="14"><draw:image xlink:href="Pictures/100000000000036C0000025100BFD626.png" xlink:type="simple" xlink:show="embed" xlink:actuate="onLoad" draw:mime-type="image/png"/></draw:frame></text:p>
      <text:p text:style-name="P57">ITechApp/app/(stack)/screens/ → detalle fábrica, máquina y sensor</text:p>
      <text:p text:style-name="P57"/>
      <text:p text:style-name="P57"><draw:frame draw:style-name="fr10" draw:name="Image16" text:anchor-type="char" svg:width="7.228cm" svg:height="4.025cm" draw:z-index="15"><draw:image xlink:href="Pictures/10000000000000B9000000677638F17E.png" xlink:type="simple" xlink:show="embed" xlink:actuate="onLoad" draw:mime-type="image/png"/></draw:frame></text:p>
      <text:p text:style-name="P57"/>
      <text:p text:style-name="P57"/>
      <text:p text:style-name="P57"/>
      <text:p text:style-name="P57"/>
      <text:p text:style-name="P57"/>
      <text:p text:style-name="P57"/>
      <text:p text:style-name="P57"/>
      <text:p text:style-name="P57">ITechApp/hooks/ → <text:span text:style-name="T11">useAnomalies</text:span>, <text:span text:style-name="T11">useMachines</text:span>, <text:span text:style-name="T11">useSensorData</text:span>…</text:p>
      <text:p text:style-name="P57"/>
      <text:p text:style-name="P57"><draw:frame draw:style-name="fr10" draw:name="Image17" text:anchor-type="char" svg:width="9.848cm" svg:height="5.743cm" draw:z-index="16"><draw:image xlink:href="Pictures/10000000000000FC00000093A93198FA.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text:soft-page-break/></text:p>
      <text:p text:style-name="P57">ITechApp/components/MachineCard.tsx → tarjeta de estado verde/rojo</text:p>
      <text:p text:style-name="P57"/>
      <text:p text:style-name="P57"><draw:frame draw:style-name="fr11" draw:name="Image18" text:anchor-type="char" svg:width="17cm" svg:height="8.433cm" draw:z-index="17"><draw:image xlink:href="Pictures/100000000000034300000254FECB40BA.png" xlink:type="simple" xlink:show="embed" xlink:actuate="onLoad" draw:mime-type="image/png"/></draw:frame></text:p>
      <text:p text:style-name="P57">ITechApp/components/AnomalyCard.tsx → tarjeta de alerta</text:p>
      <text:p text:style-name="P57"/>
      <text:p text:style-name="P58"><draw:frame draw:style-name="fr12" draw:name="Image19" text:anchor-type="char" svg:width="17cm" svg:height="10.174cm" draw:z-index="18"><draw:image xlink:href="Pictures/10000000000003350000024EAEDDD60F.png" xlink:type="simple" xlink:show="embed" xlink:actuate="onLoad" draw:mime-type="image/png"/></draw:frame></text:p>
      <text:h text:style-name="Heading_20_2" text:outline-level="2"><text:bookmark-start text:name="__RefHeading___Toc1522_2288906620"/><text:soft-page-break/>2.6 Ejecución estandarizada — Docker Compose<text:bookmark-end text:name="__RefHeading___Toc1522_2288906620"/></text:h>
      <text:p text:style-name="Standard"/>
      <text:p text:style-name="P12"><text:span text:style-name="T4">Compromiso adquirido</text:span>: Docker o script para levantar la base de datos, el ERP Odoo, el backend Java y un simulador de sensores de forma simple y estandarizada.</text:p>
      <text:p text:style-name="P12"/>
      <text:p text:style-name="P12">El archivo docker-compose.yml en la raíz del proyecto define cinco servicios que arrancan con un único comando:</text:p>
      <text:p text:style-name="P12"/>
      <text:list text:style-name="L6">
        <text:list-item>
          <text:p text:style-name="P59"><text:span text:style-name="T17">M</text:span><text:span text:style-name="T16">ysql</text:span> → imagen mysql:8, inicializa la base de datos ITech, con healthcheck que bloquea el arranque del servidor Java hasta que <text:span text:style-name="T16">MySQL</text:span> esté listo.</text:p>
        </text:list-item>
        <text:list-item>
          <text:p text:style-name="P60"><text:span text:style-name="T17">P</text:span><text:span text:style-name="T16">ostgres</text:span> → imagen postgres:15, base de datos interna de <text:span text:style-name="T18">Odoo</text:span> (requerida por <text:span text:style-name="T18">Odoo</text:span>).</text:p>
        </text:list-item>
        <text:list-item>
          <text:p text:style-name="P60"><text:span text:style-name="T19">O</text:span><text:span text:style-name="T18">doo</text:span> → imagen odoo:19, monta el directorio ./odoo como addons extra para cargar el módulo iot_maintenance automáticamente.</text:p>
        </text:list-item>
        <text:list-item>
          <text:p text:style-name="P60"><text:span text:style-name="T20">J</text:span><text:span text:style-name="T8">ava</text:span> → construida desde el <text:span text:style-name="T11">Dockerfile</text:span> del proyecto, espera a que <text:span text:style-name="T16">MySQL</text:span> y <text:span text:style-name="T18">Odoo</text:span> estén sanos antes de arrancar.</text:p>
        </text:list-item>
        <text:list-item>
          <text:p text:style-name="P60"><text:span text:style-name="T21">S</text:span>imulator — construida desde ./data_simulator, arranca tras el servidor <text:span text:style-name="T8">Java</text:span> y comienza a enviar lecturas simuladas de sensores.</text:p>
        </text:list-item>
      </text:list>
      <text:p text:style-name="P61"/>
      <text:p text:style-name="P12">Todos los servicios comparten la red interna itech_network, por lo que no se exponen puertos innecesarios al exterior salvo los de acceso (8080 para el servidor <text:span text:style-name="T8">Java</text:span>, 8069 para <text:span text:style-name="T18">Odoo</text:span>).</text:p>
      <text:p text:style-name="P12"/>
      <text:p text:style-name="P62">Dónde verificarlo:</text:p>
      <text:p text:style-name="P62"/>
      <text:p text:style-name="P58">docker-compose.yml → definición de los cinco servicios y sus dependencias</text:p>
      <text:p text:style-name="P58"/>
      <text:p text:style-name="P58"><draw:frame draw:style-name="fr13" draw:name="Image20" text:anchor-type="char" svg:width="17cm" svg:height="6.872cm" draw:z-index="19"><draw:image xlink:href="Pictures/100000000000036F00000252048BED4D.png" xlink:type="simple" xlink:show="embed" xlink:actuate="onLoad" draw:mime-type="image/png"/></draw:frame></text:p>
      <text:p text:style-name="P58"><text:soft-page-break/>Dockerfile → imagen del servidor <text:span text:style-name="T8">Java</text:span></text:p>
      <text:p text:style-name="P63"/>
      <text:p text:style-name="P63"><draw:frame draw:style-name="fr2" draw:name="Image21" text:anchor-type="char" svg:width="17cm" svg:height="10.291cm" draw:z-index="20"><draw:image xlink:href="Pictures/100000000000033A000001F411867831.png" xlink:type="simple" xlink:show="embed" xlink:actuate="onLoad" draw:mime-type="image/png"/></draw:frame></text:p>
      <text:p text:style-name="P58">data_simulator/ → imagen del simulador de sensores</text:p>
      <text:p text:style-name="P58"><draw:frame draw:style-name="fr14" draw:name="Image22" text:anchor-type="char" svg:x="0.318cm" svg:y="0.459cm" svg:width="17cm" svg:height="9.372cm" draw:z-index="21"><draw:image xlink:href="Pictures/1000000000000367000002278431D543.png" xlink:type="simple" xlink:show="embed" xlink:actuate="onLoad" draw:mime-type="image/png"/></draw:frame></text:p>
      <text:h text:style-name="Heading_20_2" text:outline-level="2"><text:bookmark-start text:name="__RefHeading___Toc1524_2288906620"/><text:soft-page-break/>2.7 (Entornos de desarrollo) RA 4 — Repositorio y control de versiones<text:bookmark-end text:name="__RefHeading___Toc1524_2288906620"/></text:h>
      <text:p text:style-name="P12"/>
      <text:p text:style-name="P12"><text:span text:style-name="T4">Compromiso adquirido</text:span>: Repositorio con al menos dos ramas (main y feature), commits adecuados y profesionales.</text:p>
      <text:p text:style-name="P12"/>
      <text:p text:style-name="P12">El proyecto se desarrolló en GitHub siguiendo un flujo de trabajo basado en ramas de funcionalidad. La rama main contiene siempre el estado entregable del proyecto. Cada bloque de desarrollo (servidor <text:span text:style-name="T8">Java</text:span>, módulo <text:span text:style-name="T16">Odoo</text:span>, frontend móvil, <text:span text:style-name="T11">Docker</text:span>) se realizó en su propia rama feature/*, que al completarse se mergeó a main mediante Pull Request.</text:p>
      <text:p text:style-name="P12"/>
      <text:p text:style-name="P12">Los mensajes de commit siguen una convención descriptiva técnic<text:span text:style-name="T21">a</text:span>, <text:span text:style-name="T21">a veces en inglés y a veces en español, </text:span>reflejando el contenido del cambio de forma concisa.</text:p>
      <text:p text:style-name="P12"/>
      <text:p text:style-name="P64">Dónde verificarlo:</text:p>
      <text:p text:style-name="P65"/>
      <text:p text:style-name="P65">github.com/paucolnav2/ITech → historial de ramas, commits y Pull Requests</text:p>
      <text:p text:style-name="P65"/>
      <text:p text:style-name="P66"><draw:frame draw:style-name="fr2" draw:name="Image23" text:anchor-type="char" svg:width="17cm" svg:height="5.844cm" draw:z-index="22"><draw:image xlink:href="Pictures/100000000000035A000001271622CB6D.png" xlink:type="simple" xlink:show="embed" xlink:actuate="onLoad" draw:mime-type="image/png"/></draw:frame></text:p>
      <text:p text:style-name="P66"/>
      <text:h text:style-name="P9" text:outline-level="1"><text:bookmark-start text:name="__RefHeading___Toc1526_2288906620"/>3. Reflexión Final<text:bookmark-end text:name="__RefHeading___Toc1526_2288906620"/></text:h>
      <text:h text:style-name="Heading_20_2" text:outline-level="2" text:is-list-header="true"><text:bookmark-start text:name="__RefHeading___Toc1528_2288906620"/>Organización del trabajo<text:bookmark-end text:name="__RefHeading___Toc1528_2288906620"/></text:h>
      <text:p text:style-name="Standard"/>
      <text:p text:style-name="P67"><text:span text:style-name="T22">Primero realicé </text:span>primero el servidor TCP con el pool de hilos, <text:span text:style-name="T22">luego </text:span>el esquema de base de datos y los DAOs, después la lógica de anomalías y la integración con Odoo, y finalmente el frontend móvil. <text:span text:style-name="T22">La funcionalidad de Docker se añadió en cierto punto pero se dejó como carcasa (es decir, levantaba los contenedores pero estaban vacíos y no eran funcionales.</text:span></text:p>
      <text:p text:style-name="P67"/>
      <text:h text:style-name="Heading_20_2" text:outline-level="2"><text:bookmark-start text:name="__RefHeading___Toc1530_2288906620"/>Dificultades encontradas<text:bookmark-end text:name="__RefHeading___Toc1530_2288906620"/></text:h>
      <text:p text:style-name="P12"/>
      <text:p text:style-name="P68">La mayor dificultad fue la gestión del tiempo, ya que mi proyecto es bastante más grande que otros proyectos PIM similares. Además de eso, he tenido que realizar el proyecto mientras hacía las prácticas en GFT Technologies, que me restaba 11 horas y media del día (9 horas y media al día más una hora de ida y vuelta). También ha sido duro implementar la funcionalidad de Odoo, ya que siempre da problemas, y cuando los solucionas, aparecen nuevos.</text:p>
      <text:p text:style-name="P68"/>
      <text:h text:style-name="Heading_20_2" text:outline-level="2"><text:bookmark-start text:name="__RefHeading___Toc1532_2288906620"/>Conclusión<text:bookmark-end text:name="__RefHeading___Toc1532_2288906620"/></text:h>
      <text:p text:style-name="P12"/>
      <text:p text:style-name="P68">Creo que ha sido un proyecto del que he aprendido mucho, en todos los aspectos y tecnologías. Ha sido muy satisfactorio ir completando los apartados (o funcionalidades) una a una e ir viendo cómo funcionaba. Ha habido veces en las que me he tenido que contener para no implementar nuevas features que me hubieran llevado días. Muy divertido y didáctico.</text:p>
      <text:p text:style-name="P68"/>
      <text:p text:style-name="P68"/>
      <text:p text:style-name="P68"/>
      <text:p text:style-name="P68"/>
      <text:p text:style-name="P68"/>
      <text:p text:style-name="P68"/>
      <text:p text:style-name="P68"/>
      <text:p text:style-name="P68"/>
      <text:p text:style-name="P68"/>
      <text:p text:style-name="P69">Pau Collado Navarro · Curso 2025–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3" draw:display-name="Gradient 3" draw:style="linear" draw:start-color="#ffffff" draw:end-color="#333333" draw:start-intensity="100%" draw:end-intensity="100%" draw:angle="91deg" draw:border="17%">
      <loext:gradient-stop svg:offset="0" loext:color-type="rgb" loext:color-value="#ffffff"/>
      <loext:gradient-stop svg:offset="1" loext:color-type="rgb" loext:color-value="#333333"/>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rst_20_paragraph" style:display-name="First paragraph" style:family="paragraph" style:parent-style-name="Text_20_body" style:next-style-name="Text_20_body" style:class="text"/>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color="#000000" loext:opacity="100%" officeooo:rsid="0011ce59" officeooo:paragraph-rsid="00075647"/>
    </style:style>
    <style:style style:name="MP2" style:family="paragraph" style:parent-style-name="Footer">
      <style:paragraph-properties fo:text-align="center" style:justify-single-word="false"/>
    </style:style>
    <style:style style:name="MT1" style:family="text">
      <style:text-properties fo:font-size="10pt" fo:font-style="normal" fo:font-weight="bold" officeooo:rsid="001316af" style:font-size-asian="10pt" style:font-style-asian="normal" style:font-weight-asian="bold" style:font-size-complex="10pt" style:font-style-complex="normal" style:font-weight-complex="bold"/>
    </style:style>
    <style:style style:name="MT2" style:family="text">
      <style:text-properties fo:font-size="10pt" fo:font-style="normal" fo:font-weight="bold" style:font-size-asian="10pt" style:font-style-asian="normal" style:font-weight-asian="bold" style:font-size-complex="10pt" style:font-style-complex="normal" style:font-weight-complex="bold"/>
    </style:style>
    <style:style style:name="MT3" style:family="text">
      <style:text-properties fo:font-size="10pt" fo:font-style="normal" fo:font-weight="bold" officeooo:rsid="001d3c05" style:font-size-asian="10pt" style:font-style-asian="normal" style:font-weight-asian="bold" style:font-size-complex="10pt" style:font-style-complex="normal" style:font-weight-complex="bold"/>
    </style:style>
    <style:style style:name="MT4" style:family="text">
      <style:text-properties fo:color="#ffffff" loext:opacity="100%"/>
    </style:style>
    <style:style style:name="MT5" style:family="text">
      <style:text-properties officeooo:rsid="001abf08"/>
    </style:style>
    <style:style style:name="MT6" style:family="text">
      <style:text-properties officeooo:rsid="00063ede"/>
    </style:style>
    <style:page-layout style:name="Mpm1">
      <style:page-layout-properties fo:page-width="21.001cm" fo:page-height="29.7cm" style:num-format="1" style:print-orientation="portrait" fo:margin-top="1.7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fine-dashed #000000" fo:padding-top="0.25cm" fo:padding-bottom="0.25cm" fo:padding-left="0.101cm" fo:padding-right="0.101cm" style:shadow="none" fo:background-color="#999999" style:dynamic-spacing="false" draw:fill="gradient" draw:fill-color="#000000" draw:fill-gradient-name="Gradient_20_3" draw:gradient-step-count="64" draw:fill-hatch-solid="false" draw:opacity="100%" draw:fill-image-width="17.87cm" draw:fill-image-height="2.341cm" style:repeat="repeat" draw:fill-image-ref-point-x="0%" draw:fill-image-ref-point-y="0%" draw:fill-image-ref-point="center"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2</text:span><text:span text:style-name="MT2">º </text:span><text:span text:style-name="MT3">DAM</text:span><text:span text:style-name="MT2"> DESARROLLO APLICACIONES MULTIPLATAFORMA</text:span> <text:s/><text:tab/><text:tab/> <text:s text:c="5"/><text:span text:style-name="MT4">IES Salvador Gadea</text:span></text:p>
        <text:p text:style-name="MP1"><text:span text:style-name="MT5">Proyecto Intermodular</text:span><text:span text:style-name="MT6"><text:tab/><text:tab/><text:tab/><text:tab/><text:tab/> <text:s text:c="27"/></text:span><text:span text:style-name="MT4">Pau Collado Navarro</text:span></text:p>
      </style:header>
      <style:header-first>
        <text:p text:style-name="Standard"/>
      </style:header-first>
      <style:footer>
        <text:p text:style-name="MP2"><text:page-number text:select-page="current">24</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19T08:04:59.391521584</meta:creation-date>
    <dc:date>2026-05-15T23:54:44.664653509</dc:date>
    <meta:editing-duration>PT3H39M18S</meta:editing-duration>
    <meta:editing-cycles>33</meta:editing-cycles>
    <meta:generator>LibreOffice/25.8.6.2$Linux_X86_64 LibreOffice_project/580$Build-2</meta:generator>
    <meta:document-statistic meta:table-count="2" meta:image-count="24" meta:object-count="0" meta:page-count="24" meta:paragraph-count="268" meta:word-count="2933" meta:character-count="19256" meta:non-whitespace-character-count="16471"/>
  </office:meta>
</office:document-meta>
</file>